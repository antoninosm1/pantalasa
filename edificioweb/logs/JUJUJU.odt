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846b" officeooo:paragraph-rsid="00058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 ahora estoy en posición de enviarte el código actualizado para proceder al siguiente paso, que consiste en poner una pantalla numero siete que va a ser una pantalla de menu, al final de todas las postales. Esto me ha llevado a reestructurar los nombres de las clases que se usan tanto en variables como en métodos y resulta que he detectado un error del código que me enviaste en el método Scroll.ejecuta_postales() que ahora pasa a llamarse Scroll.ejecuta_pantallas().</text:p>
      <text:p text:style-name="P1"/>
      <text:p text:style-name="P1">Cometiste un error rompiendo los principios del enfoque de programación que estamos siguiendo. Al cambiar las clases de nivel superior con las que trabaja el animador del concepto postal por el concepto de pantalla, ya que todas las postales ocupan una pantalla cada una, más no todas las pantallas serán de postales, el visor postales debe pasar a ser visor de pantallas, descubrí que asignas la clase “postal_activa” de manera directa en el método!!! Error en el método no puede haber nada concreto, todo debe ser indicado desde la instancia de la Clase. <text:s/></text:p>
      <text:p text:style-name="P1"/>
      <text:p text:style-name="P1">Aquí te comparto los nuevos códigos y espero tu respuesta. </text:p>
      <text:p text:style-name="P1"/>
      <text:p text:style-name="P1">Tienes que analizarlos porque ya son otros. Los voy a enviar en tres partes para no saturar tu memoria y no respondas hasta tener los tres envíos. Este ya es el primer envío de codigos. </text:p>
      <text:p text:style-name="P1"/>
      <text:p text:style-name="P1">***************</text:p>
      <text:p text:style-name="P1"/>
      <text:p text:style-name="P1">index.php</text:p>
      <text:p text:style-name="P1"/>
      <text:p text:style-name="P1"/>
      <text:p text:style-name="P1">&lt;?php</text:p>
      <text:p text:style-name="P1"><text:tab/>require_once "../pantalib/php/objetos/new/Sistema.php";</text:p>
      <text:p text:style-name="P1"><text:tab/>require_once "../pantalib/php/objetos/new/Log.php";</text:p>
      <text:p text:style-name="P1"><text:tab/>require_once "../pantalib/php/objetos/new/Session.php";</text:p>
      <text:p text:style-name="P1"><text:tab/>header('Content-Type: text/html; charset=UTF-8');</text:p>
      <text:p text:style-name="P1"><text:tab/>session_start();</text:p>
      <text:p text:style-name="P1"/>
      <text:p text:style-name="P1">// INICIA PROCESO PARA ESTABLECER SISTEMA</text:p>
      <text:p text:style-name="P1"><text:tab/>$configuraciones = [13, 'edificioweb', 1, 'http://localhost/pantalasa/edificioweb/', 1];</text:p>
      <text:p text:style-name="P1"><text:tab/>$_SESSION['Sistema'] = new Sistema($configuraciones);</text:p>
      <text:p text:style-name="P1"/>
      <text:p text:style-name="P1">// INICIA PROCESO PARA ESTABLECER LOG DE PHP</text:p>
      <text:p text:style-name="P1"><text:tab/>$archivo_log = 'kriru.txt';</text:p>
      <text:p text:style-name="P1"><text:tab/>$mensaje_log = date('Y-m-d H:i:s').' ESTABLECEMOS LOG PHP EN FLUJO PRINCIPAL EDIFICIO WEB';</text:p>
      <text:p text:style-name="P1"><text:tab/>$ruta_log = 'logs/';</text:p>
      <text:p text:style-name="P1"><text:tab/>$sistema_log = $_SESSION['Sistema'];</text:p>
      <text:p text:style-name="P1"><text:tab/>$configuraciones = [$archivo_log, $mensaje_log, $ruta_log, $sistema_log];</text:p>
      <text:p text:style-name="P1"><text:tab/>$_SESSION['logPhp'] = new Log($configuraciones);</text:p>
      <text:p text:style-name="P1"><text:tab/>$_SESSION['logPhp']-&gt;escribe_log();</text:p>
      <text:p text:style-name="P1"/>
      <text:p text:style-name="P1">// INICIA PROCESO PARA ESTABLECER SESSION</text:p>
      <text:p text:style-name="P1"><text:tab/>$configuraciones = [1];</text:p>
      <text:p text:style-name="P1"><text:tab/>$_SESSION['session'] = new Session($configuraciones);</text:p>
      <text:p text:style-name="P1"/>
      <text:p text:style-name="P1"><text:tab/>$sistema_config = $_SESSION['Sistema']-&gt;configuraciones;</text:p>
      <text:p text:style-name="P1"><text:soft-page-break/></text:p>
      <text:p text:style-name="P1">?&gt;</text:p>
      <text:p text:style-name="P1"/>
      <text:p text:style-name="P1">&lt;!DOCTYPE html&gt;</text:p>
      <text:p text:style-name="P1">&lt;html lang="es_MX"&gt;</text:p>
      <text:p text:style-name="P1"><text:s text:c="4"/>&lt;head&gt;</text:p>
      <text:p text:style-name="P1"><text:s text:c="8"/>&lt;meta charset="UTF-8"&gt;</text:p>
      <text:p text:style-name="P1"><text:s text:c="8"/>&lt;meta http-equiv="Content-Type" content="text/html; charset=iso-8859-1"/&gt;</text:p>
      <text:p text:style-name="P1"><text:tab/><text:tab/>&lt;meta http-equiv="X-UA-Compatible" content="IE=edge"&gt;</text:p>
      <text:p text:style-name="P1"><text:tab/><text:tab/>&lt;meta name="viewport" content="width=device-width, initial-scale=1.0"&gt;</text:p>
      <text:p text:style-name="P1"><text:tab/><text:tab/>&lt;title&gt;EDIFICIO WEB&lt;/title&gt;</text:p>
      <text:p text:style-name="P1"><text:s text:c="8"/>&lt;link rel="icon" href="icons8-favicon.gif" type="image/x-icon"&gt;</text:p>
      <text:p text:style-name="P1"><text:tab/><text:tab/>&lt;link rel="stylesheet" href="../pantalib/fontawesome/css/all.css"&gt;</text:p>
      <text:p text:style-name="P1"><text:tab/><text:tab/>&lt;link rel="stylesheet" href="../pantalib/css/edificioweb/edificioweb_postal.css"&gt;</text:p>
      <text:p text:style-name="P1"><text:tab/><text:tab/>&lt;link rel="stylesheet" href="../pantalib/css/edificioweb/edificioweb_portada_postal.css"&gt;</text:p>
      <text:p text:style-name="P1"><text:tab/><text:tab/>&lt;script src="../pantalib/jquery/jquery.js"&gt;&lt;/script&gt;</text:p>
      <text:p text:style-name="P1"><text:tab/><text:tab/></text:p>
      <text:p text:style-name="P1"><text:tab/><text:tab/>&lt;script src="../pantalib/javascript/objetos/mvvm/model/Session.js"&gt;&lt;/script&gt;</text:p>
      <text:p text:style-name="P1"><text:tab/><text:tab/>&lt;script src="../pantalib/javascript/objetos/mvvm/model/System.js"&gt;&lt;/script&gt;</text:p>
      <text:p text:style-name="P1"/>
      <text:p text:style-name="P1"><text:tab/><text:tab/>&lt;script src="../pantalib/javascript/objetos/mvvm/view/Load.js"&gt;&lt;/script&gt;</text:p>
      <text:p text:style-name="P1"><text:tab/><text:tab/>&lt;script src="../pantalib/javascript/objetos/mvvm/view/Maqueta.js"&gt;&lt;/script&gt;</text:p>
      <text:p text:style-name="P1"><text:s text:c="4"/></text:p>
      <text:p text:style-name="P1"><text:tab/><text:tab/>&lt;script src="../pantalib/javascript/objetos/mvvm/viewmodel/Metodos.js"&gt;&lt;/script&gt;</text:p>
      <text:p text:style-name="P1"><text:tab/><text:tab/>&lt;script src="../pantalib/javascript/objetos/mvvm/viewmodel/Scroll.js"&gt;&lt;/script&gt;</text:p>
      <text:p text:style-name="P1"/>
      <text:p text:style-name="P1"><text:tab/>&lt;/head&gt;</text:p>
      <text:p text:style-name="P1"><text:s text:c="4"/>&lt;body class="contenedor_body" id="ID_EDIFICIOWEB_BODY"&gt;</text:p>
      <text:p text:style-name="P1"><text:s text:c="8"/>EDIFICIO WEB</text:p>
      <text:p text:style-name="P1"><text:s text:c="4"/>&lt;/body&gt;</text:p>
      <text:p text:style-name="P1">&lt;/html&gt;</text:p>
      <text:p text:style-name="P1">&lt;script&gt;</text:p>
      <text:p text:style-name="P1"/>
      <text:p text:style-name="P1"><text:tab/><text:tab/>console.log('INICIA JS');</text:p>
      <text:p text:style-name="P1">// ** // ** // ** // ** // ** // ** // ** // ** // **</text:p>
      <text:p text:style-name="P1">//////////////////////////////////////////</text:p>
      <text:p text:style-name="P1">// ** // ** // ** // ** // ** // ** // ** // ** // **</text:p>
      <text:p text:style-name="P1">//////////////////////////////////////////</text:p>
      <text:p text:style-name="P1"/>
      <text:p text:style-name="P1"/>
      <text:p text:style-name="P1">// ** COMIENZA JS</text:p>
      <text:p text:style-name="P1"/>
      <text:p text:style-name="P1"/>
      <text:p text:style-name="P1">// ** // ** // ** // ** // ** // ** // ** // ** // **</text:p>
      <text:p text:style-name="P1">//////////////////////////////////////////</text:p>
      <text:p text:style-name="P1">// ** // ** // ** // ** // ** // ** // ** // ** // **</text:p>
      <text:p text:style-name="P1">//////////////////////////////////////////</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p text:style-name="P1">// ****************************************************************</text:p>
      <text:p text:style-name="P1">// ****************************************************************</text:p>
      <text:p text:style-name="P1"/>
      <text:p text:style-name="P1">// BLOQUE UNO: ESTABLECE DATOS INICIALES CLASES MODELO</text:p>
      <text:p text:style-name="P1"/>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p text:style-name="P1">// MODELS: CLASES PARA MANEJAR SESION PHP Y SISTEMA</text:p>
      <text:p text:style-name="P1">// ****************************************************************</text:p>
      <text:p text:style-name="P1"/>
      <text:p text:style-name="P1"/>
      <text:p text:style-name="P1">// CLASE........: Session</text:p>
      <text:p text:style-name="P1">// INSTANCIA....: Session_edificioweb</text:p>
      <text:p text:style-name="P1">// DESCRIPCION..: Objeto para guardar información de la session PHP en JS</text:p>
      <text:p text:style-name="P1">// HTML.........: Se genera despues de ser creado</text:p>
      <text:p text:style-name="P1"><text:tab/></text:p>
      <text:p text:style-name="P1"><text:s text:c="2"/><text:tab/>var idioma = '&lt;?php echo json_encode($_SESSION['Sistema'] -&gt; configuraciones[2]); ?&gt;';</text:p>
      <text:p text:style-name="P1"><text:s text:c="4"/>var sistema_id = &lt;?php echo json_encode($sistema_config[0]); ?&gt;;</text:p>
      <text:p text:style-name="P1"><text:tab/>var sistema_tech_name = &lt;?php echo json_encode($sistema_config[1]); ?&gt;;</text:p>
      <text:p text:style-name="P1"><text:tab/>var ruta = &lt;?php echo json_encode($sistema_config[3]); ?&gt;;</text:p>
      <text:p text:style-name="P1"><text:tab/>var idCode = 1;</text:p>
      <text:p text:style-name="P1"><text:tab/>var statusSessiono = [1, 2, 3, 4, 5];</text:p>
      <text:p text:style-name="P1"><text:tab/>var statusCheck = 1;</text:p>
      <text:p text:style-name="P1"><text:tab/>var scarlet = [idCode, statusSessiono, statusCheck, 0];</text:p>
      <text:p text:style-name="P1"><text:tab/>var scriptPhp = ['php/session_cierra_edificioweb.php', 'php/session_abre_edificioweb.php'];</text:p>
      <text:p text:style-name="P1"><text:tab/>var metodoPhp = 'POST';</text:p>
      <text:p text:style-name="P1"><text:soft-page-break/><text:tab/>var configuraciones = [scarlet, scriptPhp, metodoPhp];</text:p>
      <text:p text:style-name="P1"><text:tab/>var codigos = [''];</text:p>
      <text:p text:style-name="P1"><text:tab/>var Session_edificioweb = new Session(configuraciones, codigos);</text:p>
      <text:p text:style-name="P1"/>
      <text:p text:style-name="P1">// CLASE........: System</text:p>
      <text:p text:style-name="P1">// INSTANCIA....: Sistema_edificioweb</text:p>
      <text:p text:style-name="P1">// DESCRIPCION..: Instancia para administrar sesión de PHP </text:p>
      <text:p text:style-name="P1"><text:tab/></text:p>
      <text:p text:style-name="P1"><text:tab/>var Sistema_edificioweb = new System(sistema_id, sistema_tech_name, 'edificioweb', 'PÁGINA WEB DEL EDIFICIO DE LOS SUEÑO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 ****************************************************************</text:p>
      <text:p text:style-name="P1">// ****************************************************************</text:p>
      <text:p text:style-name="P1"/>
      <text:p text:style-name="P1">// BLOQUE DOS: PARA IMPRIMIR PANTALLA CLASES VIEW</text:p>
      <text:p text:style-name="P1"/>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 VIEW: AREA LOAD HTML</text:p>
      <text:p text:style-name="P1">// ****************************************************************</text:p>
      <text:p text:style-name="P1"/>
      <text:p text:style-name="P1"/>
      <text:p text:style-name="P1">// CLASE........: Load</text:p>
      <text:p text:style-name="P1">// INSTANCIA....: Load_edificioweb</text:p>
      <text:p text:style-name="P1">// SE INSERTA EN: #ID_GEN_CUERPO<text:tab/></text:p>
      <text:p text:style-name="P1"><text:soft-page-break/>// DESCRIPCION..: Inserta codigo HTML en un elemento del DOM</text:p>
      <text:p text:style-name="P1">// IMPRESION....: Despues de ser creado, sustitutivo</text:p>
      <text:p text:style-name="P1"/>
      <text:p text:style-name="P1"><text:tab/>var tipoImpresion = 0;</text:p>
      <text:p text:style-name="P1"><text:tab/>var posicionCallback = 0;</text:p>
      <text:p text:style-name="P1"><text:tab/>var metodosCallback01 = ['Metodos_after_portada.ejecuta()'];</text:p>
      <text:p text:style-name="P1"><text:tab/>var metodosCallback = [metodosCallback01]; </text:p>
      <text:p text:style-name="P1"><text:tab/>var statusCallback = 1;</text:p>
      <text:p text:style-name="P1"><text:tab/>var callback = [posicionCallback, metodosCallback, statusCallback];</text:p>
      <text:p text:style-name="P1"><text:tab/>var configuraciones = [tipoImpresion, callback];</text:p>
      <text:p text:style-name="P1"><text:tab/>var etiquetas = ["html/portada_pantalla.html", "#ID_EDIFICIOWEB_BODY"];</text:p>
      <text:p text:style-name="P1"><text:tab/>var Load_edificioweb = new Load(configuraciones, etiquet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 ****************************************************************</text:p>
      <text:p text:style-name="P1">// ****************************************************************</text:p>
      <text:p text:style-name="P1"/>
      <text:p text:style-name="P1">// BLOQUE TRES: PROCESOS Y PUENTES CLASES VIEW MODEL</text:p>
      <text:p text:style-name="P1"/>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 VIEWMODEL: METODOS AFTER LOAD HTML</text:p>
      <text:p text:style-name="P1">// ****************************************************************</text:p>
      <text:p text:style-name="P1"/>
      <text:p text:style-name="P1"/>
      <text:p text:style-name="P1">// CLASE........: Metodos</text:p>
      <text:p text:style-name="P1"><text:soft-page-break/>// INSTANCIA....: Metodos_after_portada</text:p>
      <text:p text:style-name="P1">// DESCRIPCION..: Metodos que se ejecutan despues de imprimir portada</text:p>
      <text:p text:style-name="P1"><text:tab/></text:p>
      <text:p text:style-name="P1"><text:tab/>var configuraciones = 0;</text:p>
      <text:p text:style-name="P1"><text:tab/>var codigos = [''];</text:p>
      <text:p text:style-name="P1"><text:tab/>var elementos = [</text:p>
      <text:p text:style-name="P1"><text:tab/></text:p>
      <text:p text:style-name="P1"><text:tab/><text:tab/>'Scroll_pantallas.ejecuta_pantallas()'</text:p>
      <text:p text:style-name="P1"/>
      <text:p text:style-name="P1"><text:tab/>];</text:p>
      <text:p text:style-name="P1"><text:tab/>var Metodos_after_portada = new Metodos(configuraciones, codigos, elementos);</text:p>
      <text:p text:style-name="P1"/>
      <text:p text:style-name="P1">// CLASE........: Scroll</text:p>
      <text:p text:style-name="P1">// INSTANCIA....: Scroll_pantallas</text:p>
      <text:p text:style-name="P1">// DESCRIPCION..: Clase para ejecutar animaciones de scroll</text:p>
      <text:p text:style-name="P1"/>
      <text:p text:style-name="P1"><text:tab/>var configuraciones = ["html", 1, window.scrollY];</text:p>
      <text:p text:style-name="P1"><text:tab/>var pantallas = [</text:p>
      <text:p text:style-name="P1"><text:s text:c="4"/><text:tab/></text:p>
      <text:p text:style-name="P1"><text:tab/><text:tab/>".postal_01",</text:p>
      <text:p text:style-name="P1"><text:s text:c="4"/><text:tab/>".postal_02",</text:p>
      <text:p text:style-name="P1"><text:s text:c="4"/><text:tab/>".postal_03",</text:p>
      <text:p text:style-name="P1"><text:s text:c="4"/><text:tab/>".postal_04",</text:p>
      <text:p text:style-name="P1"><text:s text:c="4"/><text:tab/>".postal_05",</text:p>
      <text:p text:style-name="P1"><text:s text:c="4"/><text:tab/>".postal_06",</text:p>
      <text:p text:style-name="P1"><text:s text:c="4"/><text:tab/>".menu_01"</text:p>
      <text:p text:style-name="P1"><text:tab/></text:p>
      <text:p text:style-name="P1"><text:tab/>];</text:p>
      <text:p text:style-name="P1"><text:tab/>var limites = [7, pantallas, 0];</text:p>
      <text:p text:style-name="P1"><text:tab/>var Scroll_pantallas = new Scroll(configuraciones, limites);</text:p>
      <text:p text:style-name="P1"/>
      <text:p text:style-name="P1"/>
      <text:p text:style-name="P1"><text:tab/>console.log('PUNTO DE INICIO');</text:p>
      <text:p text:style-name="P1"/>
      <text:p text:style-name="P1"><text:tab/>Load_edificioweb.imprimehtml();</text:p>
      <text:p text:style-name="P1"/>
      <text:p text:style-name="P1"/>
      <text:p text:style-name="P1"/>
      <text:p text:style-name="P1"/>
      <text:p text:style-name="P1">&lt;/script&gt;</text:p>
      <text:p text:style-name="P1"/>
      <text:p text:style-name="P1"><text:s/>*************************</text:p>
      <text:p text:style-name="P1"/>
      <text:p text:style-name="P1">portada_pantalla.html</text:p>
      <text:p text:style-name="P1"/>
      <text:p text:style-name="P1">&lt;DIV ID="visor_pantalla"&gt;</text:p>
      <text:p text:style-name="P1"/>
      <text:p text:style-name="P1"><text:s text:c="4"/>&lt;SECTION CLASS="pantalla postal_01 pantalla_activa"&gt;</text:p>
      <text:p text:style-name="P1"/>
      <text:p text:style-name="P1"><text:soft-page-break/><text:s text:c="8"/>&lt;DIV CLASS="caja_maqueta" ID="ID_MAQUETA_POSTAL_01"&gt;</text:p>
      <text:p text:style-name="P1"><text:s text:c="8"/></text:p>
      <text:p text:style-name="P1"><text:s text:c="12"/>&lt;DIV CLASS="barra_superior_contenedor" ID="ID_01_01"&gt;</text:p>
      <text:p text:style-name="P1"><text:s text:c="16"/>&lt;DIV CLASS="barra_superior texto_negro" ID="ID_01_01_01"&gt;</text:p>
      <text:p text:style-name="P1"><text:s text:c="20"/>Centro cultural y de economía solidaria.</text:p>
      <text:p text:style-name="P1"><text:s text:c="16"/>&lt;/DIV&gt;</text:p>
      <text:p text:style-name="P1"><text:s text:c="12"/>&lt;/DIV&gt;</text:p>
      <text:p text:style-name="P1"/>
      <text:p text:style-name="P1"><text:s text:c="12"/>&lt;DIV CLASS="titulo_paneles" ID="ID_01_02"&gt;</text:p>
      <text:p text:style-name="P1"><text:s text:c="12"/>&lt;/DIV&gt;</text:p>
      <text:p text:style-name="P1"/>
      <text:p text:style-name="P1"><text:s text:c="12"/>&lt;DIV CLASS="margen_derecho" ID="ID_01_03"&gt;</text:p>
      <text:p text:style-name="P1"><text:s text:c="16"/>&lt;DIV CLASS="sello_contenedor" ID="ID_01_03_01"&gt;</text:p>
      <text:p text:style-name="P1"><text:s text:c="20"/>&lt;IMG CLASS="imagen_sello" SRC="imagenes/sello.png"&gt;</text:p>
      <text:p text:style-name="P1"><text:s text:c="16"/>&lt;/DIV&gt;</text:p>
      <text:p text:style-name="P1"><text:s text:c="12"/>&lt;/DIV&gt;</text:p>
      <text:p text:style-name="P1"/>
      <text:p text:style-name="P1"><text:s text:c="12"/>&lt;DIV CLASS="panel_izquierdo" ID="ID_01_04"&gt;</text:p>
      <text:p text:style-name="P1"><text:s text:c="16"/>&lt;DIV CLASS="caja_credenciales" ID="ID_01_04_01"&gt;</text:p>
      <text:p text:style-name="P1"><text:s text:c="12"/></text:p>
      <text:p text:style-name="P1"><text:s text:c="20"/>&lt;DIV CLASS="nombre_titulo texto_negro" ID="ID_01_04_01_01"&gt;</text:p>
      <text:p text:style-name="P1"><text:s text:c="24"/>EDIFICIO DE LOS SUEÑOS</text:p>
      <text:p text:style-name="P1"><text:s text:c="20"/>&lt;/DIV&gt;</text:p>
      <text:p text:style-name="P1"><text:s text:c="20"/>&lt;DIV CLASS="logo_titulo texto_negro" ID="ID_01_04_01_02"&gt;</text:p>
      <text:p text:style-name="P1"><text:s text:c="24"/>&lt;IMG CLASS="logo_edificio" SRC="imagenes/4.svg"&gt;</text:p>
      <text:p text:style-name="P1"><text:s text:c="20"/>&lt;/DIV&gt;</text:p>
      <text:p text:style-name="P1"><text:s text:c="16"/>&lt;/DIV&gt;</text:p>
      <text:p text:style-name="P1"><text:s text:c="12"/>&lt;/DIV&gt;</text:p>
      <text:p text:style-name="P1"/>
      <text:p text:style-name="P1"><text:s text:c="12"/>&lt;DIV CLASS="division_panel_contenedor" ID="ID_01_05"&gt;</text:p>
      <text:p text:style-name="P1"><text:s text:c="16"/>&lt;DIV CLASS="division_panel fondo_gris" ID="ID_01_05_01"&gt;</text:p>
      <text:p text:style-name="P1"><text:s text:c="16"/>&lt;/DIV&gt;</text:p>
      <text:p text:style-name="P1"><text:s text:c="12"/>&lt;/DIV&gt;</text:p>
      <text:p text:style-name="P1"/>
      <text:p text:style-name="P1"><text:s text:c="12"/>&lt;DIV CLASS="panel_derecho" ID="ID_01_06"&gt;</text:p>
      <text:p text:style-name="P1"><text:s text:c="16"/>&lt;DIV CLASS="caja_domicilio" ID="ID_01_06_01"&gt;</text:p>
      <text:p text:style-name="P1"><text:s text:c="12"/></text:p>
      <text:p text:style-name="P1"><text:s text:c="20"/>&lt;DIV CLASS="frase texto_negro" ID="ID_01_06_01_01"&gt;</text:p>
      <text:p text:style-name="P1"><text:s text:c="24"/>Mi domicilio exacto son los sueños.</text:p>
      <text:p text:style-name="P1"><text:s text:c="20"/>&lt;/DIV&gt;</text:p>
      <text:p text:style-name="P1"><text:s text:c="20"/>&lt;DIV CLASS="linea_contenedor" ID="ID_01_06_01_02"&gt;</text:p>
      <text:p text:style-name="P1"><text:s text:c="24"/>&lt;DIV CLASS="linea fondo_gris" ID="ID_01_06_01_02_01"&gt;</text:p>
      <text:p text:style-name="P1"><text:s text:c="24"/>&lt;/DIV&gt;</text:p>
      <text:p text:style-name="P1"><text:s text:c="20"/>&lt;/DIV&gt;</text:p>
      <text:p text:style-name="P1"><text:s text:c="20"/>&lt;DIV CLASS="linea_contenedor" ID="ID_01_06_01_03"&gt;</text:p>
      <text:p text:style-name="P1"><text:s text:c="24"/>&lt;DIV CLASS="linea fondo_gris" ID="ID_01_06_01_03_01"&gt;</text:p>
      <text:p text:style-name="P1"><text:s text:c="24"/>&lt;/DIV&gt;</text:p>
      <text:p text:style-name="P1"><text:s text:c="20"/>&lt;/DIV&gt;</text:p>
      <text:p text:style-name="P1"><text:s text:c="20"/>&lt;DIV CLASS="linea_contenedor" ID="ID_01_06_01_04"&gt;</text:p>
      <text:p text:style-name="P1"><text:soft-page-break/><text:s text:c="24"/>&lt;DIV CLASS="linea fondo_gris" ID="ID_01_06_01_04_01"&gt;</text:p>
      <text:p text:style-name="P1"><text:s text:c="24"/>&lt;/DIV&gt;</text:p>
      <text:p text:style-name="P1"><text:s text:c="20"/>&lt;/DIV&gt;</text:p>
      <text:p text:style-name="P1"><text:s text:c="12"/></text:p>
      <text:p text:style-name="P1"><text:s text:c="16"/>&lt;/DIV&gt;</text:p>
      <text:p text:style-name="P1"><text:s text:c="12"/></text:p>
      <text:p text:style-name="P1"><text:s text:c="12"/>&lt;/DIV&gt;</text:p>
      <text:p text:style-name="P1"/>
      <text:p text:style-name="P1"/>
      <text:p text:style-name="P1"><text:s text:c="12"/>&lt;DIV CLASS="postal_pie_contenedor" ID="ID_01_07"&gt;</text:p>
      <text:p text:style-name="P1"><text:s text:c="16"/>&lt;DIV CLASS="postal_pie texto_negro" ID="ID_01_07_01"&gt;</text:p>
      <text:p text:style-name="P1"><text:s text:c="20"/>Ramón Corona Int. 210, Plaza Cervantina,&lt;BR&gt;</text:p>
      <text:p text:style-name="P1"><text:s text:c="20"/>32020 Ciudad Juárez, Chihuahua. <text:s text:c="8"/></text:p>
      <text:p text:style-name="P1"><text:s text:c="16"/>&lt;/DIV&gt;</text:p>
      <text:p text:style-name="P1"><text:s text:c="12"/>&lt;/DIV&gt;</text:p>
      <text:p text:style-name="P1"><text:s text:c="8"/>&lt;/DIV&gt;</text:p>
      <text:p text:style-name="P1"/>
      <text:p text:style-name="P1"><text:s text:c="4"/>&lt;/SECTION&gt;</text:p>
      <text:p text:style-name="P1"><text:s text:c="4"/></text:p>
      <text:p text:style-name="P1"><text:s text:c="4"/>&lt;SECTION CLASS="pantalla postal_02"&gt;</text:p>
      <text:p text:style-name="P1"><text:s text:c="8"/>&lt;DIV CLASS="caja_maqueta" ID="ID_MAQUETA_POSTAL_02"&gt;</text:p>
      <text:p text:style-name="P1"><text:s text:c="8"/></text:p>
      <text:p text:style-name="P1"><text:s text:c="12"/>&lt;DIV CLASS="barra_superior_contenedor" ID="ID_02_01"&gt;</text:p>
      <text:p text:style-name="P1"><text:s text:c="16"/>&lt;DIV CLASS="barra_superior texto_blanco" ID="ID_02_01_01"&gt;</text:p>
      <text:p text:style-name="P1"><text:s text:c="20"/>Centro cultural y de economía solidaria.</text:p>
      <text:p text:style-name="P1"><text:s text:c="16"/>&lt;/DIV&gt;</text:p>
      <text:p text:style-name="P1"><text:s text:c="12"/>&lt;/DIV&gt;</text:p>
      <text:p text:style-name="P1"/>
      <text:p text:style-name="P1"><text:s text:c="12"/>&lt;DIV CLASS="titulo_paneles" ID="ID_02_02"&gt;</text:p>
      <text:p text:style-name="P1"><text:s text:c="12"/>&lt;/DIV&gt;</text:p>
      <text:p text:style-name="P1"/>
      <text:p text:style-name="P1"><text:s text:c="12"/>&lt;DIV CLASS="margen_derecho" ID="ID_02_03"&gt;</text:p>
      <text:p text:style-name="P1"><text:s text:c="16"/>&lt;DIV CLASS="sello_contenedor" ID="ID_02_03_01"&gt;</text:p>
      <text:p text:style-name="P1"><text:s text:c="20"/>&lt;IMG CLASS="imagen_sello texto_blanco" SRC="imagenes/sello.png"&gt;</text:p>
      <text:p text:style-name="P1"><text:s text:c="16"/>&lt;/DIV&gt;</text:p>
      <text:p text:style-name="P1"><text:s text:c="12"/>&lt;/DIV&gt;</text:p>
      <text:p text:style-name="P1"/>
      <text:p text:style-name="P1"><text:s text:c="12"/>&lt;DIV CLASS="panel_izquierdo" ID="ID_02_04"&gt;</text:p>
      <text:p text:style-name="P1"><text:s text:c="16"/>&lt;DIV CLASS="caja_credenciales" ID="ID_02_04_01"&gt;</text:p>
      <text:p text:style-name="P1"><text:s text:c="12"/></text:p>
      <text:p text:style-name="P1"><text:s text:c="20"/>&lt;DIV CLASS="nombre_titulo texto_blanco" ID="ID_02_04_01_01"&gt;</text:p>
      <text:p text:style-name="P1"><text:s text:c="24"/>EDIFICIO DE LOS SUEÑOS</text:p>
      <text:p text:style-name="P1"><text:s text:c="20"/>&lt;/DIV&gt;</text:p>
      <text:p text:style-name="P1"><text:s text:c="20"/>&lt;DIV CLASS="logo_titulo texto_blanco" ID="ID_02_04_01_02"&gt;</text:p>
      <text:p text:style-name="P1"><text:s text:c="24"/>&lt;IMG CLASS="logo_edificio" SRC="imagenes/4.png"&gt;</text:p>
      <text:p text:style-name="P1"><text:s text:c="20"/>&lt;/DIV&gt;</text:p>
      <text:p text:style-name="P1"><text:s text:c="16"/>&lt;/DIV&gt;</text:p>
      <text:p text:style-name="P1"><text:s text:c="12"/>&lt;/DIV&gt;</text:p>
      <text:p text:style-name="P1"/>
      <text:p text:style-name="P1"><text:soft-page-break/><text:s text:c="12"/>&lt;DIV CLASS="division_panel_contenedor" ID="ID_02_05"&gt;</text:p>
      <text:p text:style-name="P1"><text:s text:c="16"/>&lt;DIV CLASS="division_panel fondo_blanco" ID="ID_02_05_01"&gt;</text:p>
      <text:p text:style-name="P1"><text:s text:c="16"/>&lt;/DIV&gt;</text:p>
      <text:p text:style-name="P1"><text:s text:c="12"/>&lt;/DIV&gt;</text:p>
      <text:p text:style-name="P1"/>
      <text:p text:style-name="P1"><text:s text:c="12"/>&lt;DIV CLASS="panel_derecho" ID="ID_02_06"&gt;</text:p>
      <text:p text:style-name="P1"><text:s text:c="16"/>&lt;DIV CLASS="caja_domicilio" ID="ID_02_06_01"&gt;</text:p>
      <text:p text:style-name="P1"><text:s text:c="12"/></text:p>
      <text:p text:style-name="P1"><text:s text:c="20"/>&lt;DIV CLASS="frase texto_blanco" ID="ID_02_06_02_01"&gt;</text:p>
      <text:p text:style-name="P1"><text:s text:c="24"/>Mi domicilio exacto son los sueños.</text:p>
      <text:p text:style-name="P1"><text:s text:c="20"/>&lt;/DIV&gt;</text:p>
      <text:p text:style-name="P1"><text:s text:c="20"/>&lt;DIV CLASS="linea_contenedor" ID="ID_02_06_01_02"&gt;</text:p>
      <text:p text:style-name="P1"><text:s text:c="24"/>&lt;DIV CLASS="linea fondo_blanco" ID="ID_02_06_01_02_01"&gt;</text:p>
      <text:p text:style-name="P1"><text:s text:c="24"/>&lt;/DIV&gt;</text:p>
      <text:p text:style-name="P1"><text:s text:c="20"/>&lt;/DIV&gt;</text:p>
      <text:p text:style-name="P1"><text:s text:c="20"/>&lt;DIV CLASS="linea_contenedor" ID="ID_02_06_01_03"&gt;</text:p>
      <text:p text:style-name="P1"><text:s text:c="24"/>&lt;DIV CLASS="linea fondo_blanco" ID="ID_02_06_01_03_01"&gt;</text:p>
      <text:p text:style-name="P1"><text:s text:c="24"/>&lt;/DIV&gt;</text:p>
      <text:p text:style-name="P1"><text:s text:c="20"/>&lt;/DIV&gt;</text:p>
      <text:p text:style-name="P1"><text:s text:c="20"/>&lt;DIV CLASS="linea_contenedor" ID="ID_02_06_01_04"&gt;</text:p>
      <text:p text:style-name="P1"><text:s text:c="24"/>&lt;DIV CLASS="linea fondo_blanco" ID="ID_02_06_01_04_01"&gt;</text:p>
      <text:p text:style-name="P1"><text:s text:c="24"/>&lt;/DIV&gt;</text:p>
      <text:p text:style-name="P1"><text:s text:c="20"/>&lt;/DIV&gt;</text:p>
      <text:p text:style-name="P1"><text:s text:c="12"/></text:p>
      <text:p text:style-name="P1"><text:s text:c="16"/>&lt;/DIV&gt;</text:p>
      <text:p text:style-name="P1"><text:s text:c="12"/></text:p>
      <text:p text:style-name="P1"><text:s text:c="12"/>&lt;/DIV&gt;</text:p>
      <text:p text:style-name="P1"/>
      <text:p text:style-name="P1"/>
      <text:p text:style-name="P1"><text:s text:c="12"/>&lt;DIV CLASS="postal_pie_contenedor" ID="ID_02_07"&gt;</text:p>
      <text:p text:style-name="P1"><text:s text:c="16"/>&lt;DIV CLASS="postal_pie texto_blanco" ID="ID_02_07_01"&gt;</text:p>
      <text:p text:style-name="P1"><text:s text:c="20"/>Ramón Corona Int. 210, Plaza Cervantina,&lt;BR&gt;</text:p>
      <text:p text:style-name="P1"><text:s text:c="20"/>32020 Ciudad Juárez, Chihuahua. <text:s text:c="8"/></text:p>
      <text:p text:style-name="P1"><text:s text:c="16"/>&lt;/DIV&gt;</text:p>
      <text:p text:style-name="P1"><text:s text:c="12"/>&lt;/DIV&gt;</text:p>
      <text:p text:style-name="P1"><text:s text:c="8"/>&lt;/DIV&gt;</text:p>
      <text:p text:style-name="P1"><text:s text:c="4"/>&lt;/SECTION&gt;</text:p>
      <text:p text:style-name="P1"/>
      <text:p text:style-name="P1"><text:s text:c="4"/>&lt;SECTION CLASS="pantalla postal_03"&gt;</text:p>
      <text:p text:style-name="P1"><text:s text:c="8"/>&lt;DIV CLASS="caja_maqueta" ID="ID_MAQUETA_POSTAL_03"&gt;</text:p>
      <text:p text:style-name="P1"><text:s text:c="8"/></text:p>
      <text:p text:style-name="P1"><text:s text:c="12"/>&lt;DIV CLASS="barra_superior_contenedor" ID="ID_03_01"&gt;</text:p>
      <text:p text:style-name="P1"><text:s text:c="16"/>&lt;DIV CLASS="barra_superior texto_blanco" ID="ID_03_01_01"&gt;</text:p>
      <text:p text:style-name="P1"><text:s text:c="20"/>Centro cultural y de economía solidaria.</text:p>
      <text:p text:style-name="P1"><text:s text:c="16"/>&lt;/DIV&gt;</text:p>
      <text:p text:style-name="P1"><text:s text:c="12"/>&lt;/DIV&gt;</text:p>
      <text:p text:style-name="P1"/>
      <text:p text:style-name="P1"><text:s text:c="12"/>&lt;DIV CLASS="titulo_paneles" ID="ID_03_02"&gt;</text:p>
      <text:p text:style-name="P1"><text:s text:c="12"/>&lt;/DIV&gt;</text:p>
      <text:p text:style-name="P1"><text:soft-page-break/></text:p>
      <text:p text:style-name="P1"><text:s text:c="12"/>&lt;DIV CLASS="margen_derecho" ID="ID_03_03"&gt;</text:p>
      <text:p text:style-name="P1"><text:s text:c="16"/>&lt;DIV CLASS="sello_contenedor" ID="ID_03_03_01"&gt;</text:p>
      <text:p text:style-name="P1"><text:s text:c="20"/>&lt;IMG CLASS="imagen_sello texto_blanco" SRC="imagenes/sello.png"&gt;</text:p>
      <text:p text:style-name="P1"><text:s text:c="16"/>&lt;/DIV&gt;</text:p>
      <text:p text:style-name="P1"><text:s text:c="12"/>&lt;/DIV&gt;</text:p>
      <text:p text:style-name="P1"/>
      <text:p text:style-name="P1"><text:s text:c="12"/>&lt;DIV CLASS="panel_izquierdo" ID="ID_03_04"&gt;</text:p>
      <text:p text:style-name="P1"><text:s text:c="16"/>&lt;DIV CLASS="caja_credenciales" ID="ID_03_04_01"&gt;</text:p>
      <text:p text:style-name="P1"><text:s text:c="12"/></text:p>
      <text:p text:style-name="P1"><text:s text:c="20"/>&lt;DIV CLASS="nombre_titulo texto_blanco" ID="ID_03_04_01_01"&gt;</text:p>
      <text:p text:style-name="P1"><text:s text:c="24"/>EDIFICIO DE LOS SUEÑOS</text:p>
      <text:p text:style-name="P1"><text:s text:c="20"/>&lt;/DIV&gt;</text:p>
      <text:p text:style-name="P1"><text:s text:c="20"/>&lt;DIV CLASS="logo_titulo texto_blanco" ID="ID_03_04_01_02"&gt;</text:p>
      <text:p text:style-name="P1"><text:s text:c="24"/>&lt;IMG CLASS="logo_edificio" SRC="imagenes/4.png"&gt;</text:p>
      <text:p text:style-name="P1"><text:s text:c="20"/>&lt;/DIV&gt;</text:p>
      <text:p text:style-name="P1"><text:s text:c="16"/>&lt;/DIV&gt;</text:p>
      <text:p text:style-name="P1"><text:s text:c="12"/>&lt;/DIV&gt;</text:p>
      <text:p text:style-name="P1"/>
      <text:p text:style-name="P1"><text:s text:c="12"/>&lt;DIV CLASS="division_panel_contenedor" ID="ID_03_05"&gt;</text:p>
      <text:p text:style-name="P1"><text:s text:c="16"/>&lt;DIV CLASS="division_panel fondo_blanco" ID="ID_03_05_01"&gt;</text:p>
      <text:p text:style-name="P1"><text:s text:c="16"/>&lt;/DIV&gt;</text:p>
      <text:p text:style-name="P1"><text:s text:c="12"/>&lt;/DIV&gt;</text:p>
      <text:p text:style-name="P1"/>
      <text:p text:style-name="P1"><text:s text:c="12"/>&lt;DIV CLASS="panel_derecho" ID="ID_03_06"&gt;</text:p>
      <text:p text:style-name="P1"><text:s text:c="16"/>&lt;DIV CLASS="caja_domicilio" ID="ID_03_06_01"&gt;</text:p>
      <text:p text:style-name="P1"><text:s text:c="12"/></text:p>
      <text:p text:style-name="P1"><text:s text:c="20"/>&lt;DIV CLASS="frase texto_blanco" ID="ID_03_06_02_01"&gt;</text:p>
      <text:p text:style-name="P1"><text:s text:c="24"/>Mi domicilio exacto son los sueños.</text:p>
      <text:p text:style-name="P1"><text:s text:c="20"/>&lt;/DIV&gt;</text:p>
      <text:p text:style-name="P1"><text:s text:c="20"/>&lt;DIV CLASS="linea_contenedor" ID="ID_03_06_01_02"&gt;</text:p>
      <text:p text:style-name="P1"><text:s text:c="24"/>&lt;DIV CLASS="linea fondo_blanco" ID="ID_03_06_01_02_01"&gt;</text:p>
      <text:p text:style-name="P1"><text:s text:c="24"/>&lt;/DIV&gt;</text:p>
      <text:p text:style-name="P1"><text:s text:c="20"/>&lt;/DIV&gt;</text:p>
      <text:p text:style-name="P1"><text:s text:c="20"/>&lt;DIV CLASS="linea_contenedor" ID="ID_03_06_01_03"&gt;</text:p>
      <text:p text:style-name="P1"><text:s text:c="24"/>&lt;DIV CLASS="linea fondo_blanco" ID="ID_03_06_01_03_01"&gt;</text:p>
      <text:p text:style-name="P1"><text:s text:c="24"/>&lt;/DIV&gt;</text:p>
      <text:p text:style-name="P1"><text:s text:c="20"/>&lt;/DIV&gt;</text:p>
      <text:p text:style-name="P1"><text:s text:c="20"/>&lt;DIV CLASS="linea_contenedor" ID="ID_03_06_01_04"&gt;</text:p>
      <text:p text:style-name="P1"><text:s text:c="24"/>&lt;DIV CLASS="linea fondo_blanco" ID="ID_03_06_01_04_01"&gt;</text:p>
      <text:p text:style-name="P1"><text:s text:c="24"/>&lt;/DIV&gt;</text:p>
      <text:p text:style-name="P1"><text:s text:c="20"/>&lt;/DIV&gt;</text:p>
      <text:p text:style-name="P1"><text:s text:c="12"/></text:p>
      <text:p text:style-name="P1"><text:s text:c="16"/>&lt;/DIV&gt;</text:p>
      <text:p text:style-name="P1"><text:s text:c="12"/></text:p>
      <text:p text:style-name="P1"><text:s text:c="12"/>&lt;/DIV&gt;</text:p>
      <text:p text:style-name="P1"/>
      <text:p text:style-name="P1"/>
      <text:p text:style-name="P1"><text:s text:c="12"/>&lt;DIV CLASS="postal_pie_contenedor" ID="ID_03_07"&gt;</text:p>
      <text:p text:style-name="P1"><text:soft-page-break/><text:s text:c="16"/>&lt;DIV CLASS="postal_pie texto_blanco" ID="ID_03_07_01"&gt;</text:p>
      <text:p text:style-name="P1"><text:s text:c="20"/>Ramón Corona Int. 210, Plaza Cervantina,&lt;BR&gt;</text:p>
      <text:p text:style-name="P1"><text:s text:c="20"/>32020 Ciudad Juárez, Chihuahua. <text:s text:c="8"/></text:p>
      <text:p text:style-name="P1"><text:s text:c="16"/>&lt;/DIV&gt;</text:p>
      <text:p text:style-name="P1"><text:s text:c="12"/>&lt;/DIV&gt;</text:p>
      <text:p text:style-name="P1"><text:s text:c="8"/>&lt;/DIV&gt;</text:p>
      <text:p text:style-name="P1"><text:s text:c="4"/>&lt;/SECTION&gt;</text:p>
      <text:p text:style-name="P1"/>
      <text:p text:style-name="P1"><text:s text:c="4"/>&lt;SECTION CLASS="pantalla postal_04"&gt;</text:p>
      <text:p text:style-name="P1"><text:s text:c="8"/>POSTAL 4</text:p>
      <text:p text:style-name="P1"><text:s text:c="4"/>&lt;/SECTION&gt;</text:p>
      <text:p text:style-name="P1"/>
      <text:p text:style-name="P1"><text:s text:c="4"/>&lt;SECTION CLASS="pantalla postal_05"&gt;</text:p>
      <text:p text:style-name="P1"><text:s text:c="8"/>POSTAL 5</text:p>
      <text:p text:style-name="P1"><text:s text:c="4"/>&lt;/SECTION&gt;</text:p>
      <text:p text:style-name="P1"/>
      <text:p text:style-name="P1"><text:s text:c="4"/>&lt;SECTION CLASS="pantalla postal_06"&gt;</text:p>
      <text:p text:style-name="P1"><text:s text:c="8"/>POSTAL 6</text:p>
      <text:p text:style-name="P1"><text:s text:c="4"/>&lt;/SECTION&gt;</text:p>
      <text:p text:style-name="P1"/>
      <text:p text:style-name="P1"><text:s text:c="4"/>&lt;SECTION CLASS="menu menu_01"&gt;</text:p>
      <text:p text:style-name="P1"><text:s text:c="8"/>PANTALLA DE MENU</text:p>
      <text:p text:style-name="P1"><text:s text:c="4"/>&lt;/SECTION&gt;</text:p>
      <text:p text:style-name="P1"/>
      <text:p text:style-name="P1">&lt;/DIV&gt;</text:p>
      <text:p text:style-name="P1"/>
      <text:p text:style-name="P1">&lt;DIV ID="scroll_pantallas"&gt;</text:p>
      <text:p text:style-name="P1"/>
      <text:p text:style-name="P1">&lt;/DIV&gt;</text:p>
      <text:p text:style-name="P1"/>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SEGUNDO BLOQUE</text:p>
      <text:p text:style-name="P1"/>
      <text:p text:style-name="P1">***********************</text:p>
      <text:p text:style-name="P1"/>
      <text:p text:style-name="P1">Scroll.js</text:p>
      <text:p text:style-name="P1"/>
      <text:p text:style-name="P1">function Scroll(configuraciones, limites) {</text:p>
      <text:p text:style-name="P1"><text:tab/>this.configuraciones = configuraciones;</text:p>
      <text:p text:style-name="P1"><text:tab/>this.limites = limites;</text:p>
      <text:p text:style-name="P1">}</text:p>
      <text:p text:style-name="P1">Scroll.prototype.esconde = function() {</text:p>
      <text:p text:style-name="P1"><text:s text:c="4"/>const scrollableArea = document.querySelector(this.configuraciones[0]);</text:p>
      <text:p text:style-name="P1">// Ejemplo: Ocultar la barra de desplazamiento cuando no se usa</text:p>
      <text:p text:style-name="P1"><text:s text:c="4"/>let isScrolling;</text:p>
      <text:p text:style-name="P1"><text:s text:c="4"/>scrollableArea.addEventListener('scroll', () =&gt; {</text:p>
      <text:p text:style-name="P1"><text:s text:c="8"/>window.clearTimeout(isScrolling);</text:p>
      <text:p text:style-name="P1"><text:s text:c="8"/>scrollableArea.style.overflowY = 'scroll';</text:p>
      <text:p text:style-name="P1"><text:s text:c="4"/></text:p>
      <text:p text:style-name="P1"><text:s text:c="8"/>isScrolling = setTimeout(() =&gt; {</text:p>
      <text:p text:style-name="P1"><text:s text:c="12"/>scrollableArea.style.overflowY = 'hidden';</text:p>
      <text:p text:style-name="P1"><text:s text:c="8"/>}, 1000); // 1 segundo después de terminar de desplazar</text:p>
      <text:p text:style-name="P1"><text:s text:c="4"/>});</text:p>
      <text:p text:style-name="P1">};</text:p>
      <text:p text:style-name="P1"/>
      <text:p text:style-name="P1">Scroll.prototype.ejecuta = function() {</text:p>
      <text:p text:style-name="P1"><text:s text:c="4"/>if (this.configuraciones[1]===1) {</text:p>
      <text:p text:style-name="P1"/>
      <text:p text:style-name="P1"><text:s text:c="8"/>//alert("ESTOY ACTIVANDO UNA ANIMACIÓN DE TIPO SCROLL");</text:p>
      <text:p text:style-name="P1"/>
      <text:p text:style-name="P1"><text:s text:c="8"/>window.addEventListener('scroll', () =&gt; {</text:p>
      <text:p text:style-name="P1"><text:s text:c="12"/>console.log('hay movimiento de scroll');</text:p>
      <text:p text:style-name="P1"/>
      <text:p text:style-name="P1"><text:s text:c="12"/>let elemento = document.querySelector(this.configuraciones[0]);</text:p>
      <text:p text:style-name="P1"/>
      <text:p text:style-name="P1"><text:s text:c="12"/>let nuevaPosicion = elemento.scrollTop;</text:p>
      <text:p text:style-name="P1"><text:s text:c="12"/>let posicionAnterior = this.configuraciones[2];</text:p>
      <text:p text:style-name="P1"><text:s text:c="12"/>let max = elemento.scrollHeight - elemento.clientHeight;</text:p>
      <text:p text:style-name="P1"><text:s text:c="12"/>let limites = this.limites[0];</text:p>
      <text:p text:style-name="P1"><text:s text:c="12"/>let areas = limites + 1;</text:p>
      <text:p text:style-name="P1"><text:soft-page-break/><text:s text:c="12"/>if (nuevaPosicion &gt; posicionAnterior) {</text:p>
      <text:p text:style-name="P1"/>
      <text:p text:style-name="P1"><text:s text:c="16"/>console.log('hay movimiento de scroll hacia abajo');</text:p>
      <text:p text:style-name="P1"/>
      <text:p text:style-name="P1"><text:s text:c="16"/>let elementos = document.querySelectorAll(".opcion_menu");</text:p>
      <text:p text:style-name="P1"/>
      <text:p text:style-name="P1"><text:s text:c="16"/>elementos.forEach(el =&gt; {</text:p>
      <text:p text:style-name="P1"><text:s text:c="20"/>if (el.classList.contains("opcion_menu_invisible")) {</text:p>
      <text:p text:style-name="P1"><text:s text:c="24"/>el.classList.remove("opcion_menu_invisible");</text:p>
      <text:p text:style-name="P1"><text:s text:c="24"/>el.classList.add("opcion_menu_visible");</text:p>
      <text:p text:style-name="P1"><text:s text:c="20"/>}</text:p>
      <text:p text:style-name="P1"><text:s text:c="20"/>else {</text:p>
      <text:p text:style-name="P1"><text:s text:c="20"/>};</text:p>
      <text:p text:style-name="P1"><text:s text:c="16"/>});</text:p>
      <text:p text:style-name="P1"/>
      <text:p text:style-name="P1"><text:s text:c="12"/>} </text:p>
      <text:p text:style-name="P1"><text:s text:c="12"/>else {</text:p>
      <text:p text:style-name="P1"><text:s text:c="16"/>if (nuevaPosicion &lt; posicionAnterior) {</text:p>
      <text:p text:style-name="P1"><text:s text:c="20"/>console.log('hay movimiento de scroll hacia arriba');</text:p>
      <text:p text:style-name="P1"/>
      <text:p text:style-name="P1"><text:s text:c="20"/>let elementos = document.querySelectorAll(".opcion_menu");</text:p>
      <text:p text:style-name="P1"/>
      <text:p text:style-name="P1"><text:s text:c="20"/>elementos.forEach(el =&gt; {</text:p>
      <text:p text:style-name="P1"><text:s text:c="24"/>if (!el.classList.contains("opcion_menu_invisible")) {</text:p>
      <text:p text:style-name="P1"><text:s text:c="27"/>el.classList.remove("opcion_menu_visible");</text:p>
      <text:p text:style-name="P1"><text:s text:c="27"/>el.classList.add("opcion_menu_invisible");</text:p>
      <text:p text:style-name="P1"><text:s text:c="24"/>}</text:p>
      <text:p text:style-name="P1"><text:s text:c="24"/>else {</text:p>
      <text:p text:style-name="P1"><text:s text:c="24"/>};</text:p>
      <text:p text:style-name="P1"><text:s text:c="20"/>});</text:p>
      <text:p text:style-name="P1"><text:s text:c="16"/>}</text:p>
      <text:p text:style-name="P1"><text:s text:c="12"/>} </text:p>
      <text:p text:style-name="P1"/>
      <text:p text:style-name="P1"><text:s text:c="12"/>this.configuraciones[2] = nuevaPosicion;</text:p>
      <text:p text:style-name="P1"/>
      <text:p text:style-name="P1"><text:s text:c="8"/>});</text:p>
      <text:p text:style-name="P1"><text:s text:c="4"/>};</text:p>
      <text:p text:style-name="P1">};</text:p>
      <text:p text:style-name="P1"/>
      <text:p text:style-name="P1">function Scroll(configuraciones, limites) {</text:p>
      <text:p text:style-name="P1"/>
      <text:p text:style-name="P1"><text:s text:c="4"/>this.configuraciones = configuraciones;</text:p>
      <text:p text:style-name="P1"><text:s text:c="4"/>this.limites = limites;</text:p>
      <text:p text:style-name="P1"/>
      <text:p text:style-name="P1">}</text:p>
      <text:p text:style-name="P1"/>
      <text:p text:style-name="P1">Scroll.prototype.ejecuta_pantallas = function() {</text:p>
      <text:p text:style-name="P1"/>
      <text:p text:style-name="P1"><text:s text:c="4"/>console.log(</text:p>
      <text:p text:style-name="P1"><text:soft-page-break/><text:s text:c="8"/>"INICIA ejecuta_pantallas()"</text:p>
      <text:p text:style-name="P1"><text:s text:c="4"/>);</text:p>
      <text:p text:style-name="P1"/>
      <text:p text:style-name="P1"><text:s text:c="4"/>// VALIDAMOS STATUS</text:p>
      <text:p text:style-name="P1"/>
      <text:p text:style-name="P1"><text:s text:c="4"/>console.log(</text:p>
      <text:p text:style-name="P1"><text:s text:c="8"/>"STATUS SCROLL:",</text:p>
      <text:p text:style-name="P1"><text:s text:c="8"/>this.configuraciones[1]</text:p>
      <text:p text:style-name="P1"><text:s text:c="4"/>);</text:p>
      <text:p text:style-name="P1"/>
      <text:p text:style-name="P1"><text:s text:c="4"/>if (this.configuraciones[1] === 1) {</text:p>
      <text:p text:style-name="P1"/>
      <text:p text:style-name="P1"><text:s text:c="8"/>console.log(</text:p>
      <text:p text:style-name="P1"><text:s text:c="12"/>"SCROLL ACTIVADO"</text:p>
      <text:p text:style-name="P1"><text:s text:c="8"/>);</text:p>
      <text:p text:style-name="P1"/>
      <text:p text:style-name="P1"><text:s text:c="8"/>// IMPRIMIMOS CONFIGURACIÓN</text:p>
      <text:p text:style-name="P1"/>
      <text:p text:style-name="P1"><text:s text:c="8"/>console.log(</text:p>
      <text:p text:style-name="P1"><text:s text:c="12"/>"POSTALES CONFIG:",</text:p>
      <text:p text:style-name="P1"><text:s text:c="12"/>this.limites</text:p>
      <text:p text:style-name="P1"><text:s text:c="8"/>);</text:p>
      <text:p text:style-name="P1"/>
      <text:p text:style-name="P1"><text:s text:c="8"/>// ESCUCHAMOS SCROLL</text:p>
      <text:p text:style-name="P1"/>
      <text:p text:style-name="P1"><text:s text:c="8"/>window.addEventListener(</text:p>
      <text:p text:style-name="P1"/>
      <text:p text:style-name="P1"><text:s text:c="12"/>'scroll',</text:p>
      <text:p text:style-name="P1"/>
      <text:p text:style-name="P1"><text:s text:c="12"/>() =&gt; {</text:p>
      <text:p text:style-name="P1"/>
      <text:p text:style-name="P1"><text:s text:c="16"/>console.log(</text:p>
      <text:p text:style-name="P1"><text:s text:c="20"/>"-----------------------------------"</text:p>
      <text:p text:style-name="P1"><text:s text:c="16"/>);</text:p>
      <text:p text:style-name="P1"/>
      <text:p text:style-name="P1"><text:s text:c="16"/>console.log(</text:p>
      <text:p text:style-name="P1"><text:s text:c="20"/>"EVENTO SCROLL DETECTADO"</text:p>
      <text:p text:style-name="P1"><text:s text:c="16"/>);</text:p>
      <text:p text:style-name="P1"/>
      <text:p text:style-name="P1"><text:s text:c="16"/>// POSICIÓN ACTUAL</text:p>
      <text:p text:style-name="P1"/>
      <text:p text:style-name="P1"><text:s text:c="16"/>let nuevaPosicion =</text:p>
      <text:p text:style-name="P1"><text:s text:c="20"/>window.scrollY;</text:p>
      <text:p text:style-name="P1"/>
      <text:p text:style-name="P1"><text:s text:c="16"/>console.log(</text:p>
      <text:p text:style-name="P1"><text:s text:c="20"/>"window.scrollY:",</text:p>
      <text:p text:style-name="P1"><text:s text:c="20"/>nuevaPosicion</text:p>
      <text:p text:style-name="P1"><text:s text:c="16"/>);</text:p>
      <text:p text:style-name="P1"/>
      <text:p text:style-name="P1"><text:soft-page-break/><text:s text:c="16"/>// ALTURA PANTALLA</text:p>
      <text:p text:style-name="P1"/>
      <text:p text:style-name="P1"><text:s text:c="16"/>let alturaPantalla =</text:p>
      <text:p text:style-name="P1"><text:s text:c="20"/>window.innerHeight;</text:p>
      <text:p text:style-name="P1"/>
      <text:p text:style-name="P1"><text:s text:c="16"/>console.log(</text:p>
      <text:p text:style-name="P1"><text:s text:c="20"/>"window.innerHeight:",</text:p>
      <text:p text:style-name="P1"><text:s text:c="20"/>alturaPantalla</text:p>
      <text:p text:style-name="P1"><text:s text:c="16"/>);</text:p>
      <text:p text:style-name="P1"/>
      <text:p text:style-name="P1"><text:s text:c="16"/>// ÁREA CALCULADA</text:p>
      <text:p text:style-name="P1"/>
      <text:p text:style-name="P1"><text:s text:c="16"/>let nuevaArea =</text:p>
      <text:p text:style-name="P1"><text:s text:c="20"/>Math.floor(</text:p>
      <text:p text:style-name="P1"><text:s text:c="24"/>nuevaPosicion /</text:p>
      <text:p text:style-name="P1"><text:s text:c="24"/>alturaPantalla</text:p>
      <text:p text:style-name="P1"><text:s text:c="20"/>);</text:p>
      <text:p text:style-name="P1"/>
      <text:p text:style-name="P1"><text:s text:c="16"/>console.log(</text:p>
      <text:p text:style-name="P1"><text:s text:c="20"/>"NUEVA AREA CALCULADA:",</text:p>
      <text:p text:style-name="P1"><text:s text:c="20"/>nuevaArea</text:p>
      <text:p text:style-name="P1"><text:s text:c="16"/>);</text:p>
      <text:p text:style-name="P1"/>
      <text:p text:style-name="P1"><text:s text:c="16"/>// CONTROL DE LÍMITE</text:p>
      <text:p text:style-name="P1"/>
      <text:p text:style-name="P1"><text:s text:c="16"/>if (nuevaArea &gt;= this.limites[0]) {</text:p>
      <text:p text:style-name="P1"/>
      <text:p text:style-name="P1"><text:s text:c="20"/>console.log(</text:p>
      <text:p text:style-name="P1"><text:s text:c="24"/>"AREA EXCEDE LIMITE"</text:p>
      <text:p text:style-name="P1"><text:s text:c="20"/>);</text:p>
      <text:p text:style-name="P1"/>
      <text:p text:style-name="P1"><text:s text:c="20"/>nuevaArea =</text:p>
      <text:p text:style-name="P1"><text:s text:c="24"/>this.limites[0] - 1;</text:p>
      <text:p text:style-name="P1"/>
      <text:p text:style-name="P1"><text:s text:c="16"/>}</text:p>
      <text:p text:style-name="P1"/>
      <text:p text:style-name="P1"><text:s text:c="16"/>console.log(</text:p>
      <text:p text:style-name="P1"><text:s text:c="20"/>"AREA FINAL:",</text:p>
      <text:p text:style-name="P1"><text:s text:c="20"/>nuevaArea</text:p>
      <text:p text:style-name="P1"><text:s text:c="16"/>);</text:p>
      <text:p text:style-name="P1"/>
      <text:p text:style-name="P1"><text:s text:c="16"/>// ÁREA ANTERIOR</text:p>
      <text:p text:style-name="P1"/>
      <text:p text:style-name="P1"><text:s text:c="16"/>let areaAnterior =</text:p>
      <text:p text:style-name="P1"><text:s text:c="20"/>this.limites[2];</text:p>
      <text:p text:style-name="P1"/>
      <text:p text:style-name="P1"><text:s text:c="16"/>console.log(</text:p>
      <text:p text:style-name="P1"><text:s text:c="20"/>"AREA ANTERIOR:",</text:p>
      <text:p text:style-name="P1"><text:s text:c="20"/>areaAnterior</text:p>
      <text:p text:style-name="P1"><text:soft-page-break/><text:s text:c="16"/>);</text:p>
      <text:p text:style-name="P1"/>
      <text:p text:style-name="P1"><text:s text:c="16"/>// VALIDAMOS CAMBIO</text:p>
      <text:p text:style-name="P1"/>
      <text:p text:style-name="P1"><text:s text:c="16"/>if (nuevaArea !== areaAnterior) {</text:p>
      <text:p text:style-name="P1"/>
      <text:p text:style-name="P1"><text:s text:c="20"/>console.log(</text:p>
      <text:p text:style-name="P1"><text:s text:c="24"/>"CAMBIO DE AREA DETECTADO"</text:p>
      <text:p text:style-name="P1"><text:s text:c="20"/>);</text:p>
      <text:p text:style-name="P1"/>
      <text:p text:style-name="P1"><text:s text:c="20"/>// ACTIVAS</text:p>
      <text:p text:style-name="P1"/>
      <text:p text:style-name="P1"><text:s text:c="20"/>let activas =</text:p>
      <text:p text:style-name="P1"><text:s text:c="24"/>document.querySelectorAll(</text:p>
      <text:p text:style-name="P1"><text:s text:c="28"/>".postal_activa"</text:p>
      <text:p text:style-name="P1"><text:s text:c="24"/>);</text:p>
      <text:p text:style-name="P1"/>
      <text:p text:style-name="P1"><text:s text:c="20"/>console.log(</text:p>
      <text:p text:style-name="P1"><text:s text:c="24"/>"POSTALES ACTIVAS:",</text:p>
      <text:p text:style-name="P1"><text:s text:c="24"/>activas.length</text:p>
      <text:p text:style-name="P1"><text:s text:c="20"/>);</text:p>
      <text:p text:style-name="P1"/>
      <text:p text:style-name="P1"><text:s text:c="20"/>// REMOVER ACTIVAS</text:p>
      <text:p text:style-name="P1"/>
      <text:p text:style-name="P1"><text:s text:c="20"/>activas.forEach(</text:p>
      <text:p text:style-name="P1"/>
      <text:p text:style-name="P1"><text:s text:c="24"/>el =&gt; {</text:p>
      <text:p text:style-name="P1"/>
      <text:p text:style-name="P1"><text:s text:c="28"/>console.log(</text:p>
      <text:p text:style-name="P1"><text:s text:c="32"/>"REMOVIENDO CLASE A:",</text:p>
      <text:p text:style-name="P1"><text:s text:c="32"/>el</text:p>
      <text:p text:style-name="P1"><text:s text:c="28"/>);</text:p>
      <text:p text:style-name="P1"/>
      <text:p text:style-name="P1"><text:s text:c="28"/>el.classList.remove(</text:p>
      <text:p text:style-name="P1"><text:s text:c="32"/>"postal_activa"</text:p>
      <text:p text:style-name="P1"><text:s text:c="28"/>);</text:p>
      <text:p text:style-name="P1"/>
      <text:p text:style-name="P1"><text:s text:c="24"/>}</text:p>
      <text:p text:style-name="P1"/>
      <text:p text:style-name="P1"><text:s text:c="20"/>);</text:p>
      <text:p text:style-name="P1"/>
      <text:p text:style-name="P1"><text:s text:c="20"/>// SELECTOR NUEVO</text:p>
      <text:p text:style-name="P1"/>
      <text:p text:style-name="P1"><text:s text:c="20"/>let selector =</text:p>
      <text:p text:style-name="P1"><text:s text:c="24"/>this.limites[1][nuevaArea];</text:p>
      <text:p text:style-name="P1"/>
      <text:p text:style-name="P1"><text:s text:c="20"/>console.log(</text:p>
      <text:p text:style-name="P1"><text:s text:c="24"/>"SELECTOR NUEVO:",</text:p>
      <text:p text:style-name="P1"><text:s text:c="24"/>selector</text:p>
      <text:p text:style-name="P1"><text:soft-page-break/><text:s text:c="20"/>);</text:p>
      <text:p text:style-name="P1"/>
      <text:p text:style-name="P1"><text:s text:c="20"/>// BUSCAR POSTAL</text:p>
      <text:p text:style-name="P1"/>
      <text:p text:style-name="P1"><text:s text:c="20"/>let postal =</text:p>
      <text:p text:style-name="P1"><text:s text:c="24"/>document.querySelector(</text:p>
      <text:p text:style-name="P1"><text:s text:c="28"/>selector</text:p>
      <text:p text:style-name="P1"><text:s text:c="24"/>);</text:p>
      <text:p text:style-name="P1"/>
      <text:p text:style-name="P1"><text:s text:c="20"/>console.log(</text:p>
      <text:p text:style-name="P1"><text:s text:c="24"/>"POSTAL ENCONTRADA:",</text:p>
      <text:p text:style-name="P1"><text:s text:c="24"/>postal</text:p>
      <text:p text:style-name="P1"><text:s text:c="20"/>);</text:p>
      <text:p text:style-name="P1"/>
      <text:p text:style-name="P1"><text:s text:c="20"/>// VALIDAR POSTAL</text:p>
      <text:p text:style-name="P1"/>
      <text:p text:style-name="P1"><text:s text:c="20"/>if (postal) {</text:p>
      <text:p text:style-name="P1"/>
      <text:p text:style-name="P1"><text:s text:c="24"/>console.log(</text:p>
      <text:p text:style-name="P1"><text:s text:c="28"/>"AGREGANDO CLASE postal_activa"</text:p>
      <text:p text:style-name="P1"><text:s text:c="24"/>);</text:p>
      <text:p text:style-name="P1"/>
      <text:p text:style-name="P1"><text:s text:c="24"/>postal.classList.add(</text:p>
      <text:p text:style-name="P1"><text:s text:c="28"/>"postal_activa"</text:p>
      <text:p text:style-name="P1"><text:s text:c="24"/>);</text:p>
      <text:p text:style-name="P1"/>
      <text:p text:style-name="P1"><text:s text:c="20"/>}</text:p>
      <text:p text:style-name="P1"><text:s text:c="20"/>else {</text:p>
      <text:p text:style-name="P1"/>
      <text:p text:style-name="P1"><text:s text:c="24"/>console.log(</text:p>
      <text:p text:style-name="P1"><text:s text:c="28"/>"ERROR: NO EXISTE POSTAL"</text:p>
      <text:p text:style-name="P1"><text:s text:c="24"/>);</text:p>
      <text:p text:style-name="P1"/>
      <text:p text:style-name="P1"><text:s text:c="20"/>}</text:p>
      <text:p text:style-name="P1"/>
      <text:p text:style-name="P1"><text:s text:c="20"/>// GUARDAR ÁREA</text:p>
      <text:p text:style-name="P1"/>
      <text:p text:style-name="P1"><text:s text:c="20"/>this.limites[2] =</text:p>
      <text:p text:style-name="P1"><text:s text:c="24"/>nuevaArea;</text:p>
      <text:p text:style-name="P1"/>
      <text:p text:style-name="P1"><text:s text:c="20"/>console.log(</text:p>
      <text:p text:style-name="P1"><text:s text:c="24"/>"NUEVA AREA GUARDADA:",</text:p>
      <text:p text:style-name="P1"><text:s text:c="24"/>this.limites[2]</text:p>
      <text:p text:style-name="P1"><text:s text:c="20"/>);</text:p>
      <text:p text:style-name="P1"/>
      <text:p text:style-name="P1"><text:s text:c="16"/>}</text:p>
      <text:p text:style-name="P1"><text:s text:c="16"/>else {</text:p>
      <text:p text:style-name="P1"/>
      <text:p text:style-name="P1"><text:s text:c="20"/>console.log(</text:p>
      <text:p text:style-name="P1"><text:soft-page-break/><text:s text:c="24"/>"NO HAY CAMBIO DE AREA"</text:p>
      <text:p text:style-name="P1"><text:s text:c="20"/>);</text:p>
      <text:p text:style-name="P1"/>
      <text:p text:style-name="P1"><text:s text:c="16"/>}</text:p>
      <text:p text:style-name="P1"/>
      <text:p text:style-name="P1"><text:s text:c="16"/>// GUARDAR POSICIÓN</text:p>
      <text:p text:style-name="P1"/>
      <text:p text:style-name="P1"><text:s text:c="16"/>this.configuraciones[2] =</text:p>
      <text:p text:style-name="P1"><text:s text:c="20"/>nuevaPosicion;</text:p>
      <text:p text:style-name="P1"/>
      <text:p text:style-name="P1"><text:s text:c="16"/>console.log(</text:p>
      <text:p text:style-name="P1"><text:s text:c="20"/>"POSICION GUARDADA:",</text:p>
      <text:p text:style-name="P1"><text:s text:c="20"/>this.configuraciones[2]</text:p>
      <text:p text:style-name="P1"><text:s text:c="16"/>);</text:p>
      <text:p text:style-name="P1"/>
      <text:p text:style-name="P1"><text:s text:c="12"/>}</text:p>
      <text:p text:style-name="P1"/>
      <text:p text:style-name="P1"><text:s text:c="8"/>);</text:p>
      <text:p text:style-name="P1"/>
      <text:p text:style-name="P1"><text:s text:c="4"/>}</text:p>
      <text:p text:style-name="P1"><text:s text:c="4"/>else {</text:p>
      <text:p text:style-name="P1"/>
      <text:p text:style-name="P1"><text:s text:c="8"/>console.log(</text:p>
      <text:p text:style-name="P1"><text:s text:c="12"/>"SCROLL DESACTIVADO"</text:p>
      <text:p text:style-name="P1"><text:s text:c="8"/>);</text:p>
      <text:p text:style-name="P1"/>
      <text:p text:style-name="P1"><text:s text:c="4"/>}</text:p>
      <text:p text:style-name="P1"/>
      <text:p text:style-name="P1">};</text:p>
      <text:p text:style-name="P1"/>
      <text:p text:style-name="P1">********************************</text:p>
      <text:p text:style-name="P1">Metodos.js</text:p>
      <text:p text:style-name="P1"/>
      <text:p text:style-name="P1">function Metodos(configuraciones, codigos, elementos) {</text:p>
      <text:p text:style-name="P1"><text:tab/>this.configuraciones = configuraciones;</text:p>
      <text:p text:style-name="P1"><text:tab/>this.codigos = codigos;</text:p>
      <text:p text:style-name="P1"><text:tab/>this.elementos = elementos;</text:p>
      <text:p text:style-name="P1">}</text:p>
      <text:p text:style-name="P1">Metodos.prototype.ejecuta = function() {</text:p>
      <text:p text:style-name="P1"><text:s text:c="4"/>console.log('ESTOY EN METODO EJECUTA');</text:p>
      <text:p text:style-name="P1"><text:s text:c="4"/>var i = 0;</text:p>
      <text:p text:style-name="P1"><text:s text:c="4"/>while(i &lt; this.elementos.length) {</text:p>
      <text:p text:style-name="P1"><text:s text:c="8"/>eval(this.elementos[i]);</text:p>
      <text:p text:style-name="P1"><text:s text:c="8"/>i++;</text:p>
      <text:p text:style-name="P1"><text:s text:c="4"/>}</text:p>
      <text:p text:style-name="P1">};<text:tab/> <text:s text:c="2"/><text:tab/><text:tab/><text:tab/><text:tab/><text:tab/><text:tab/></text:p>
      <text:p text:style-name="P1">Metodos.prototype.recibe_opcion = function(opcion) {</text:p>
      <text:p text:style-name="P1"><text:s text:c="4"/>this.configuraciones[1] = opcion;</text:p>
      <text:p text:style-name="P1">};<text:tab/> <text:s text:c="2"/><text:tab/><text:tab/><text:tab/><text:tab/><text:tab/><text:tab/></text:p>
      <text:p text:style-name="P1"><text:soft-page-break/>Metodos.prototype.ejecuta_opcion = function() {</text:p>
      <text:p text:style-name="P1"><text:s text:c="4"/>alert('ESTA ES LA OPCIÓN: '+this.configuraciones[1]);</text:p>
      <text:p text:style-name="P1">};<text:tab/> <text:s text:c="2"/><text:tab/><text:tab/><text:tab/><text:tab/><text:tab/><text:tab/></text:p>
      <text:p text:style-name="P1"/>
      <text:p text:style-name="P1">*********************************</text:p>
      <text:p text:style-name="P1">Load.js</text:p>
      <text:p text:style-name="P1"/>
      <text:p text:style-name="P1">function Load(configuraciones, etiquetas) {</text:p>
      <text:p text:style-name="P1"><text:tab/>this.configuraciones = configuraciones;</text:p>
      <text:p text:style-name="P1"><text:tab/>this.etiquetas = etiquetas;</text:p>
      <text:p text:style-name="P1">}</text:p>
      <text:p text:style-name="P1"/>
      <text:p text:style-name="P1">Load.prototype.imprimehtml = function() {</text:p>
      <text:p text:style-name="P1"/>
      <text:p text:style-name="P1"><text:s text:c="4"/>let self = this; <text:s/>// referencia segura a la instancia</text:p>
      <text:p text:style-name="P1"/>
      <text:p text:style-name="P1"><text:s text:c="4"/>$.ajax({</text:p>
      <text:p text:style-name="P1"><text:s text:c="8"/>url: self.etiquetas[0],</text:p>
      <text:p text:style-name="P1"><text:s text:c="8"/>type: "GET",</text:p>
      <text:p text:style-name="P1"><text:s text:c="8"/>dataType: "html",</text:p>
      <text:p text:style-name="P1"><text:s text:c="8"/>success: function (html) {</text:p>
      <text:p text:style-name="P1"><text:s text:c="12"/>if (self.configuraciones[0] === 0) {</text:p>
      <text:p text:style-name="P1"><text:s text:c="16"/>$(self.etiquetas[1]).html(html);</text:p>
      <text:p text:style-name="P1"><text:s text:c="12"/>} else if (self.configuraciones[0] === 1) {</text:p>
      <text:p text:style-name="P1"><text:s text:c="16"/>$(self.etiquetas[1]).append(html);</text:p>
      <text:p text:style-name="P1"><text:s text:c="12"/>}</text:p>
      <text:p text:style-name="P1"/>
      <text:p text:style-name="P1"><text:s text:c="12"/>if (self.configuraciones[1][2] != 0) {</text:p>
      <text:p text:style-name="P1"><text:s text:c="16"/>var i = 0;</text:p>
      <text:p text:style-name="P1"><text:s text:c="16"/>while (i &lt; self.configuraciones[1][1][self.configuraciones[1][0]].length) {</text:p>
      <text:p text:style-name="P1"><text:s text:c="20"/>eval(self.configuraciones[1][1][self.configuraciones[1][0]][i]);</text:p>
      <text:p text:style-name="P1"><text:s text:c="20"/>i++;</text:p>
      <text:p text:style-name="P1"><text:s text:c="16"/>}</text:p>
      <text:p text:style-name="P1"><text:s text:c="12"/>}</text:p>
      <text:p text:style-name="P1"><text:s text:c="4"/></text:p>
      <text:p text:style-name="P1"><text:s text:c="8"/>},</text:p>
      <text:p text:style-name="P1"><text:s text:c="8"/>error: function () {</text:p>
      <text:p text:style-name="P1"><text:s text:c="12"/>console.error("Error al cargar el HTML externo.");</text:p>
      <text:p text:style-name="P1"><text:s text:c="8"/>}</text:p>
      <text:p text:style-name="P1"><text:s text:c="4"/>});</text:p>
      <text:p text:style-name="P1">};</text:p>
      <text:p text:style-name="P1"/>
      <text:p text:style-name="P1"/>
      <text:p text:style-name="P1">********************************</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RCER BLOQUE</text:p>
      <text:p text:style-name="P1"/>
      <text:p text:style-name="P1">*********************</text:p>
      <text:p text:style-name="P1"/>
      <text:p text:style-name="P1">edificioweb_postal.css</text:p>
      <text:p text:style-name="P1"/>
      <text:p text:style-name="P1">/*XXXXXXXXXXXXXXXXXXXXXXXXXXXXXXXXXXXXXXXXXXXXXXXXXX*/</text:p>
      <text:p text:style-name="P1">/*XXXXXXXXXXXXXXXXXXXXXXXXXXXXXXXXXXXXXXXXXXXXXXXXXX*/</text:p>
      <text:p text:style-name="P1">/* edificioweb_postal.css */</text:p>
      <text:p text:style-name="P1">/*XXXXXXXXXXXXXXXXXXXXXXXXXXXXXXXXXXXXXXXXXXXXXXXXXX*/</text:p>
      <text:p text:style-name="P1">/*XXXXXXXXXXXXXXXXXXXXXXXXXXXXXXXXXXXXXXXXXXXXXXXXXX*/</text:p>
      <text:p text:style-name="P1"/>
      <text:p text:style-name="P1">* {</text:p>
      <text:p text:style-name="P1"><text:s text:c="4"/>margin: 0;</text:p>
      <text:p text:style-name="P1"><text:s text:c="4"/>padding: 0;</text:p>
      <text:p text:style-name="P1"><text:s text:c="4"/>box-sizing: border-box;</text:p>
      <text:p text:style-name="P1"><text:s text:c="3"/>font-size: 28px; <text:s text:c="2"/>/* tamaño base para todo el documento */</text:p>
      <text:p text:style-name="P1">}</text:p>
      <text:p text:style-name="P1"/>
      <text:p text:style-name="P1">@font-face {</text:p>
      <text:p text:style-name="P1"><text:s text:c="4"/>font-family: 'Switzer';</text:p>
      <text:p text:style-name="P1"><text:s text:c="4"/>src: url('../../fonts/switzer/Fonts/WEB/fonts/Switzer-Medium.woff2') format('woff2');</text:p>
      <text:p text:style-name="P1"><text:s text:c="4"/>font-weight: 600;</text:p>
      <text:p text:style-name="P1">}</text:p>
      <text:p text:style-name="P1"/>
      <text:p text:style-name="P1">body {</text:p>
      <text:p text:style-name="P1"/>
      <text:p text:style-name="P1"><text:s text:c="4"/>box-sizing: border-box;</text:p>
      <text:p text:style-name="P1"><text:s text:c="4"/>font-family: 'Switzer';</text:p>
      <text:p text:style-name="P1"><text:s text:c="4"/>width: 100%;</text:p>
      <text:p text:style-name="P1"><text:s text:c="4"/>max-width: 100%;</text:p>
      <text:p text:style-name="P1"><text:s text:c="4"/>min-width: 350px;</text:p>
      <text:p text:style-name="P1"><text:s text:c="4"/>overflow-x: hidden;</text:p>
      <text:p text:style-name="P1"/>
      <text:p text:style-name="P1">}</text:p>
      <text:p text:style-name="P1"/>
      <text:p text:style-name="P1">*********************</text:p>
      <text:p text:style-name="P1"/>
      <text:p text:style-name="P1">edificioweb_portada_postal.css</text:p>
      <text:p text:style-name="P1"/>
      <text:p text:style-name="P1"><text:soft-page-break/></text:p>
      <text:p text:style-name="P1">/*XXXXXXXXXXXXXXXXXXXXXXXXXXXXXXXXXXXXXXXXXXXXXXXXXX*/</text:p>
      <text:p text:style-name="P1">/*XXXXXXXXXXXXXXXXXXXXXXXXXXXXXXXXXXXXXXXXXXXXXXXXXX*/</text:p>
      <text:p text:style-name="P1">/* edificioweb_portada_postal.css */</text:p>
      <text:p text:style-name="P1">/*XXXXXXXXXXXXXXXXXXXXXXXXXXXXXXXXXXXXXXXXXXXXXXXXXX*/</text:p>
      <text:p text:style-name="P1">/*XXXXXXXXXXXXXXXXXXXXXXXXXXXXXXXXXXXXXXXXXXXXXXXXXX*/</text:p>
      <text:p text:style-name="P1"/>
      <text:p text:style-name="P1"/>
      <text:p text:style-name="P1"/>
      <text:p text:style-name="P1">#visor_pantallas {</text:p>
      <text:p text:style-name="P1"/>
      <text:p text:style-name="P1"><text:s text:c="4"/>position: fixed;</text:p>
      <text:p text:style-name="P1"><text:s text:c="4"/>top: 0;</text:p>
      <text:p text:style-name="P1"><text:s text:c="4"/>left: 0;</text:p>
      <text:p text:style-name="P1"><text:s text:c="4"/>width: 100vw;</text:p>
      <text:p text:style-name="P1"><text:s text:c="4"/>height: 100vh;</text:p>
      <text:p text:style-name="P1"><text:s text:c="4"/>overflow: hidden;</text:p>
      <text:p text:style-name="P1"/>
      <text:p text:style-name="P1">}</text:p>
      <text:p text:style-name="P1"/>
      <text:p text:style-name="P1">#scroll_pantallas {</text:p>
      <text:p text:style-name="P1"/>
      <text:p text:style-name="P1"><text:s text:c="4"/>height: 1500vh;</text:p>
      <text:p text:style-name="P1">}</text:p>
      <text:p text:style-name="P1"/>
      <text:p text:style-name="P1">/*XXXXXXXXXXXXXXXXXXXXXXXXXXXXXXXXXXXXXXXXXXXXXXXXXX*/</text:p>
      <text:p text:style-name="P1">/*XXXXXXXXXXXXXXXXXXXXXXXXXXXXXXXXXXXXXXXXXXXXXXXXXX*/</text:p>
      <text:p text:style-name="P1">/* COLORES</text:p>
      <text:p text:style-name="P1">/*XXXXXXXXXXXXXXXXXXXXXXXXXXXXXXXXXXXXXXXXXXXXXXXXXX*/</text:p>
      <text:p text:style-name="P1">/*XXXXXXXXXXXXXXXXXXXXXXXXXXXXXXXXXXXXXXXXXXXXXXXXXX*/</text:p>
      <text:p text:style-name="P1"/>
      <text:p text:style-name="P1">.fondo_blanco {</text:p>
      <text:p text:style-name="P1"><text:s text:c="4"/>background-color: white;</text:p>
      <text:p text:style-name="P1">}</text:p>
      <text:p text:style-name="P1"/>
      <text:p text:style-name="P1">.fondo_negro {</text:p>
      <text:p text:style-name="P1"><text:s text:c="4"/>background-color: white;</text:p>
      <text:p text:style-name="P1">}</text:p>
      <text:p text:style-name="P1"/>
      <text:p text:style-name="P1">.fondo_gris {</text:p>
      <text:p text:style-name="P1"><text:s text:c="4"/>background-color: gray;</text:p>
      <text:p text:style-name="P1">}</text:p>
      <text:p text:style-name="P1"/>
      <text:p text:style-name="P1">.texto_blanco {</text:p>
      <text:p text:style-name="P1"><text:s text:c="4"/>color: white;</text:p>
      <text:p text:style-name="P1">}</text:p>
      <text:p text:style-name="P1"/>
      <text:p text:style-name="P1">.texto_negro {</text:p>
      <text:p text:style-name="P1"><text:s text:c="4"/>color: black;</text:p>
      <text:p text:style-name="P1"><text:soft-page-break/>}</text:p>
      <text:p text:style-name="P1"/>
      <text:p text:style-name="P1"/>
      <text:p text:style-name="P1">.pantalla {</text:p>
      <text:p text:style-name="P1"><text:s text:c="4"/>box-sizing: border-box;</text:p>
      <text:p text:style-name="P1"/>
      <text:p text:style-name="P1"><text:s text:c="4"/>position: absolute;</text:p>
      <text:p text:style-name="P1"/>
      <text:p text:style-name="P1"><text:s text:c="4"/>top: 0;</text:p>
      <text:p text:style-name="P1"><text:s text:c="4"/>left: 0;</text:p>
      <text:p text:style-name="P1"/>
      <text:p text:style-name="P1"><text:s text:c="4"/>width: 100%;</text:p>
      <text:p text:style-name="P1"><text:s text:c="4"/>height: 100%;</text:p>
      <text:p text:style-name="P1"/>
      <text:p text:style-name="P1"><text:s text:c="4"/>opacity: 0;</text:p>
      <text:p text:style-name="P1"/>
      <text:p text:style-name="P1"><text:s text:c="4"/>z-index: 1;</text:p>
      <text:p text:style-name="P1"/>
      <text:p text:style-name="P1"><text:s text:c="4"/>display: flex;</text:p>
      <text:p text:style-name="P1"><text:s text:c="4"/>justify-content: center;</text:p>
      <text:p text:style-name="P1"><text:s text:c="4"/>align-items: center;</text:p>
      <text:p text:style-name="P1"/>
      <text:p text:style-name="P1"><text:s text:c="4"/>transform:</text:p>
      <text:p text:style-name="P1"><text:s text:c="8"/>scale(1.08)</text:p>
      <text:p text:style-name="P1"><text:s text:c="8"/>translateY(100px);</text:p>
      <text:p text:style-name="P1"/>
      <text:p text:style-name="P1"><text:s text:c="4"/>transition:</text:p>
      <text:p text:style-name="P1"><text:s text:c="8"/>opacity 1.2s ease,</text:p>
      <text:p text:style-name="P1"><text:s text:c="8"/>transform 1.2s ease;</text:p>
      <text:p text:style-name="P1"/>
      <text:p text:style-name="P1"><text:s text:c="4"/>background-size: cover;</text:p>
      <text:p text:style-name="P1"><text:s text:c="4"/>background-position: center;</text:p>
      <text:p text:style-name="P1">}</text:p>
      <text:p text:style-name="P1"/>
      <text:p text:style-name="P1">.pantalla_activa {</text:p>
      <text:p text:style-name="P1"/>
      <text:p text:style-name="P1"><text:s text:c="4"/>opacity: 1;</text:p>
      <text:p text:style-name="P1"><text:s text:c="4"/>z-index: 10;</text:p>
      <text:p text:style-name="P1"><text:s text:c="4"/>transform:</text:p>
      <text:p text:style-name="P1"><text:s text:c="8"/>scale(1)</text:p>
      <text:p text:style-name="P1"><text:s text:c="8"/>translateY(0px);</text:p>
      <text:p text:style-name="P1">}</text:p>
      <text:p text:style-name="P1"/>
      <text:p text:style-name="P1">.postal_01 {</text:p>
      <text:p text:style-name="P1"><text:s text:c="4"/>background: white;</text:p>
      <text:p text:style-name="P1">}</text:p>
      <text:p text:style-name="P1"/>
      <text:p text:style-name="P1">.postal_02 {</text:p>
      <text:p text:style-name="P1"><text:s text:c="4"/>background-image: url("../../../edificioweb/imagenes/edificio_suenos02.jpeg");</text:p>
      <text:p text:style-name="P1"><text:soft-page-break/><text:s text:c="4"/>background-repeat: no-repeat;</text:p>
      <text:p text:style-name="P1"><text:s text:c="4"/>background-size: cover;</text:p>
      <text:p text:style-name="P1"><text:s text:c="4"/>background-position: center;</text:p>
      <text:p text:style-name="P1">}</text:p>
      <text:p text:style-name="P1"/>
      <text:p text:style-name="P1">.postal_03 {</text:p>
      <text:p text:style-name="P1"><text:s text:c="4"/>background-image: url("../../../edificioweb/imagenes/edificio_suenos.jpeg");</text:p>
      <text:p text:style-name="P1"><text:s text:c="4"/>background-repeat: no-repeat;</text:p>
      <text:p text:style-name="P1"><text:s text:c="4"/>background-size: cover;</text:p>
      <text:p text:style-name="P1"><text:s text:c="4"/>background-position: center;</text:p>
      <text:p text:style-name="P1">}</text:p>
      <text:p text:style-name="P1"/>
      <text:p text:style-name="P1">.postal_04 {</text:p>
      <text:p text:style-name="P1"><text:s text:c="4"/>background: rgb(225,235,220);</text:p>
      <text:p text:style-name="P1">}</text:p>
      <text:p text:style-name="P1"/>
      <text:p text:style-name="P1">.postal_05 {</text:p>
      <text:p text:style-name="P1"><text:s text:c="4"/>background: rgb(225,235,220);</text:p>
      <text:p text:style-name="P1">}</text:p>
      <text:p text:style-name="P1"/>
      <text:p text:style-name="P1">.postal_06 {</text:p>
      <text:p text:style-name="P1"><text:s text:c="4"/>background: rgb(225,235,220);</text:p>
      <text:p text:style-name="P1">}</text:p>
      <text:p text:style-name="P1"/>
      <text:p text:style-name="P1">.menu_01 {</text:p>
      <text:p text:style-name="P1"><text:s text:c="4"/>background: rgb(225,235,220);</text:p>
      <text:p text:style-name="P1">}</text:p>
      <text:p text:style-name="P1"/>
      <text:p text:style-name="P1">/*XXXXXXXXXXXXXXXXXXXXXXXXXXXXXXXXXXXXXXXXXXXXXXXXXX*/</text:p>
      <text:p text:style-name="P1">/*XXXXXXXXXXXXXXXXXXXXXXXXXXXXXXXXXXXXXXXXXXXXXXXXXX*/</text:p>
      <text:p text:style-name="P1">/* BARRA SUPERIOR DE LA POSTAL</text:p>
      <text:p text:style-name="P1">/*XXXXXXXXXXXXXXXXXXXXXXXXXXXXXXXXXXXXXXXXXXXXXXXXXX*/</text:p>
      <text:p text:style-name="P1">/*XXXXXXXXXXXXXXXXXXXXXXXXXXXXXXXXXXXXXXXXXXXXXXXXXX*/</text:p>
      <text:p text:style-name="P1"/>
      <text:p text:style-name="P1">.barra_superior_contenedor {</text:p>
      <text:p text:style-name="P1"><text:s text:c="4"/>box-sizing: border-box;</text:p>
      <text:p text:style-name="P1"><text:tab/>grid-area: BARRSUP;</text:p>
      <text:p text:style-name="P1"><text:s text:c="4"/>display: flex;</text:p>
      <text:p text:style-name="P1"><text:s text:c="4"/>flex-direction: row;</text:p>
      <text:p text:style-name="P1"><text:s text:c="4"/>justify-content: space-between; <text:s text:c="4"/>/* centra horizontal */</text:p>
      <text:p text:style-name="P1"><text:s text:c="4"/>align-items: center;</text:p>
      <text:p text:style-name="P1">}</text:p>
      <text:p text:style-name="P1"/>
      <text:p text:style-name="P1">.barra_superior {</text:p>
      <text:p text:style-name="P1"><text:s text:c="4"/>box-sizing: border-box;</text:p>
      <text:p text:style-name="P1"><text:s text:c="4"/>font-size: .8em;</text:p>
      <text:p text:style-name="P1"><text:s text:c="4"/>padding-left: 1.5em;</text:p>
      <text:p text:style-name="P1"><text:s text:c="4"/>padding-right: 1.5em;</text:p>
      <text:p text:style-name="P1">}</text:p>
      <text:p text:style-name="P1"><text:soft-page-break/></text:p>
      <text:p text:style-name="P1">/*XXXXXXXXXXXXXXXXXXXXXXXXXXXXXXXXXXXXXXXXXXXXXXXXXX*/</text:p>
      <text:p text:style-name="P1">/*XXXXXXXXXXXXXXXXXXXXXXXXXXXXXXXXXXXXXXXXXXXXXXXXXX*/</text:p>
      <text:p text:style-name="P1">/* AREA DE PANELES</text:p>
      <text:p text:style-name="P1">/*XXXXXXXXXXXXXXXXXXXXXXXXXXXXXXXXXXXXXXXXXXXXXXXXXX*/</text:p>
      <text:p text:style-name="P1">/*XXXXXXXXXXXXXXXXXXXXXXXXXXXXXXXXXXXXXXXXXXXXXXXXXX*/</text:p>
      <text:p text:style-name="P1"/>
      <text:p text:style-name="P1">.titulo_paneles {</text:p>
      <text:p text:style-name="P1"><text:s text:c="4"/>box-sizing: border-box;</text:p>
      <text:p text:style-name="P1"><text:tab/>grid-area: TITUPAN;</text:p>
      <text:p text:style-name="P1">}</text:p>
      <text:p text:style-name="P1"/>
      <text:p text:style-name="P1">.margen_derecho {</text:p>
      <text:p text:style-name="P1"><text:s text:c="4"/>box-sizing: border-box;</text:p>
      <text:p text:style-name="P1"><text:tab/>grid-area: MARGDER;</text:p>
      <text:p text:style-name="P1"><text:s text:c="4"/>display: flex;</text:p>
      <text:p text:style-name="P1"><text:s text:c="4"/>flex-direction: column;</text:p>
      <text:p text:style-name="P1"><text:s text:c="4"/>align-items: center;</text:p>
      <text:p text:style-name="P1">}</text:p>
      <text:p text:style-name="P1"/>
      <text:p text:style-name="P1">.sello_contenedor {</text:p>
      <text:p text:style-name="P1"><text:s text:c="4"/>width: 4.3em;</text:p>
      <text:p text:style-name="P1">}</text:p>
      <text:p text:style-name="P1">.imagen_sello {</text:p>
      <text:p text:style-name="P1"><text:s text:c="4"/>width: 100%;</text:p>
      <text:p text:style-name="P1">}</text:p>
      <text:p text:style-name="P1"/>
      <text:p text:style-name="P1">/*XXXXXXXXXXXXXXXXXXXXXXXXXXXXXXXXXXXXXXXXXXXXXXXXXX*/</text:p>
      <text:p text:style-name="P1">/*XXXXXXXXXXXXXXXXXXXXXXXXXXXXXXXXXXXXXXXXXXXXXXXXXX*/</text:p>
      <text:p text:style-name="P1">/* PANEL IZQUIERDO</text:p>
      <text:p text:style-name="P1">/*XXXXXXXXXXXXXXXXXXXXXXXXXXXXXXXXXXXXXXXXXXXXXXXXXX*/</text:p>
      <text:p text:style-name="P1">/*XXXXXXXXXXXXXXXXXXXXXXXXXXXXXXXXXXXXXXXXXXXXXXXXXX*/</text:p>
      <text:p text:style-name="P1"/>
      <text:p text:style-name="P1">.panel_izquierdo {</text:p>
      <text:p text:style-name="P1"><text:s text:c="4"/>box-sizing: border-box;</text:p>
      <text:p text:style-name="P1"><text:tab/>grid-area: PANEIZQ;</text:p>
      <text:p text:style-name="P1"><text:s text:c="4"/>display: flex;</text:p>
      <text:p text:style-name="P1"><text:s text:c="4"/>flex-direction: row;</text:p>
      <text:p text:style-name="P1"><text:s text:c="4"/>justify-content: space-between; </text:p>
      <text:p text:style-name="P1"><text:s text:c="4"/>align-items: center;</text:p>
      <text:p text:style-name="P1"><text:s text:c="4"/>/*border: 1px solid green;*/</text:p>
      <text:p text:style-name="P1">}</text:p>
      <text:p text:style-name="P1"/>
      <text:p text:style-name="P1">.caja_credenciales {</text:p>
      <text:p text:style-name="P1"><text:s text:c="4"/>box-sizing: border-box;</text:p>
      <text:p text:style-name="P1"><text:s text:c="4"/>width: 100%;</text:p>
      <text:p text:style-name="P1"><text:s text:c="4"/>/*border: 1px solid green;*/</text:p>
      <text:p text:style-name="P1"><text:s text:c="4"/>display:flex;</text:p>
      <text:p text:style-name="P1"><text:s text:c="4"/>flex-direction:row;</text:p>
      <text:p text:style-name="P1"><text:soft-page-break/><text:s text:c="4"/>justify-content:center;</text:p>
      <text:p text:style-name="P1"><text:s text:c="4"/>align-items:center;</text:p>
      <text:p text:style-name="P1">}</text:p>
      <text:p text:style-name="P1"/>
      <text:p text:style-name="P1">.nombre_titulo {</text:p>
      <text:p text:style-name="P1"><text:s text:c="4"/>box-sizing: border-box;</text:p>
      <text:p text:style-name="P1"><text:s text:c="4"/>font-size: 1.6em;</text:p>
      <text:p text:style-name="P1"><text:s text:c="4"/>text-align: right;</text:p>
      <text:p text:style-name="P1"><text:s text:c="4"/>line-height: 1.1;</text:p>
      <text:p text:style-name="P1"><text:s text:c="4"/>padding: .4em;</text:p>
      <text:p text:style-name="P1">}</text:p>
      <text:p text:style-name="P1"/>
      <text:p text:style-name="P1">.logo_titulo {</text:p>
      <text:p text:style-name="P1"><text:s text:c="4"/>box-sizing: border-box;</text:p>
      <text:p text:style-name="P1"><text:s text:c="4"/>text-align: left;</text:p>
      <text:p text:style-name="P1"><text:s text:c="4"/>line-height: 1.15;</text:p>
      <text:p text:style-name="P1"/>
      <text:p text:style-name="P1">}</text:p>
      <text:p text:style-name="P1">.logo_edificio {</text:p>
      <text:p text:style-name="P1"><text:s text:c="4"/>width: 2.1em;</text:p>
      <text:p text:style-name="P1">}</text:p>
      <text:p text:style-name="P1"/>
      <text:p text:style-name="P1">/*XXXXXXXXXXXXXXXXXXXXXXXXXXXXXXXXXXXXXXXXXXXXXXXXXX*/</text:p>
      <text:p text:style-name="P1">/*XXXXXXXXXXXXXXXXXXXXXXXXXXXXXXXXXXXXXXXXXXXXXXXXXX*/</text:p>
      <text:p text:style-name="P1">/* AREA DE DIVISIÓN</text:p>
      <text:p text:style-name="P1">/*XXXXXXXXXXXXXXXXXXXXXXXXXXXXXXXXXXXXXXXXXXXXXXXXXX*/</text:p>
      <text:p text:style-name="P1">/*XXXXXXXXXXXXXXXXXXXXXXXXXXXXXXXXXXXXXXXXXXXXXXXXXX*/</text:p>
      <text:p text:style-name="P1"/>
      <text:p text:style-name="P1">.division_panel_contenedor {</text:p>
      <text:p text:style-name="P1"><text:s text:c="4"/>box-sizing: border-box;</text:p>
      <text:p text:style-name="P1"><text:tab/>grid-area: DIVISIO;</text:p>
      <text:p text:style-name="P1"><text:s text:c="4"/>padding: 1.8em;</text:p>
      <text:p text:style-name="P1"><text:s text:c="4"/>/*border: 1px solid green;*/</text:p>
      <text:p text:style-name="P1"><text:s text:c="4"/>display:flex;</text:p>
      <text:p text:style-name="P1"><text:s text:c="4"/>flex-direction:column;</text:p>
      <text:p text:style-name="P1"><text:s text:c="4"/>justify-content:center;</text:p>
      <text:p text:style-name="P1"><text:s text:c="4"/>align-items:center;</text:p>
      <text:p text:style-name="P1">}</text:p>
      <text:p text:style-name="P1"/>
      <text:p text:style-name="P1">.division_panel {</text:p>
      <text:p text:style-name="P1"><text:s text:c="4"/>width: 1.5px;</text:p>
      <text:p text:style-name="P1"><text:s text:c="4"/>height: 100%;</text:p>
      <text:p text:style-name="P1">}</text:p>
      <text:p text:style-name="P1"/>
      <text:p text:style-name="P1">/*XXXXXXXXXXXXXXXXXXXXXXXXXXXXXXXXXXXXXXXXXXXXXXXXXX*/</text:p>
      <text:p text:style-name="P1">/*XXXXXXXXXXXXXXXXXXXXXXXXXXXXXXXXXXXXXXXXXXXXXXXXXX*/</text:p>
      <text:p text:style-name="P1">/* PANEL DERECHO</text:p>
      <text:p text:style-name="P1">/*XXXXXXXXXXXXXXXXXXXXXXXXXXXXXXXXXXXXXXXXXXXXXXXXXX*/</text:p>
      <text:p text:style-name="P1">/*XXXXXXXXXXXXXXXXXXXXXXXXXXXXXXXXXXXXXXXXXXXXXXXXXX*/</text:p>
      <text:p text:style-name="P1"><text:soft-page-break/></text:p>
      <text:p text:style-name="P1">.panel_derecho {</text:p>
      <text:p text:style-name="P1"><text:s text:c="4"/>box-sizing: border-box;</text:p>
      <text:p text:style-name="P1"><text:tab/>grid-area: PANEDER;</text:p>
      <text:p text:style-name="P1"><text:s text:c="4"/>display: flex;</text:p>
      <text:p text:style-name="P1"><text:s text:c="4"/>flex-direction: row;</text:p>
      <text:p text:style-name="P1"><text:s text:c="4"/>justify-content: space-between; </text:p>
      <text:p text:style-name="P1"><text:s text:c="4"/>align-items: center;</text:p>
      <text:p text:style-name="P1">}</text:p>
      <text:p text:style-name="P1"/>
      <text:p text:style-name="P1">.caja_domicilio {</text:p>
      <text:p text:style-name="P1"><text:s text:c="4"/>box-sizing: border-box;</text:p>
      <text:p text:style-name="P1"><text:s text:c="4"/>width: 100%;</text:p>
      <text:p text:style-name="P1"><text:s text:c="4"/>display:flex;</text:p>
      <text:p text:style-name="P1"><text:s text:c="4"/>flex-direction:column;</text:p>
      <text:p text:style-name="P1"><text:s text:c="4"/>justify-content:center;</text:p>
      <text:p text:style-name="P1"><text:s text:c="4"/>align-items:center;</text:p>
      <text:p text:style-name="P1">}</text:p>
      <text:p text:style-name="P1"/>
      <text:p text:style-name="P1">.frase {</text:p>
      <text:p text:style-name="P1"><text:s text:c="4"/>box-sizing: border-box;</text:p>
      <text:p text:style-name="P1"><text:s text:c="4"/>width: 100%;</text:p>
      <text:p text:style-name="P1"><text:s text:c="4"/>font-size: 1.1em;</text:p>
      <text:p text:style-name="P1"><text:s text:c="4"/>line-height: 1.1;</text:p>
      <text:p text:style-name="P1"><text:s text:c="4"/>padding-top: 1em;</text:p>
      <text:p text:style-name="P1"><text:s text:c="4"/>padding-bottom: 1em;</text:p>
      <text:p text:style-name="P1"><text:s text:c="4"/>padding-left: .2em;</text:p>
      <text:p text:style-name="P1"><text:s text:c="4"/>padding-right: .2em;</text:p>
      <text:p text:style-name="P1">}</text:p>
      <text:p text:style-name="P1"/>
      <text:p text:style-name="P1">.linea_contenedor {</text:p>
      <text:p text:style-name="P1"><text:s text:c="4"/>box-sizing: border-box;</text:p>
      <text:p text:style-name="P1"><text:s text:c="4"/>width: 100%;</text:p>
      <text:p text:style-name="P1"><text:s text:c="4"/>height: 2.4em;</text:p>
      <text:p text:style-name="P1"><text:s text:c="4"/>padding: .2em;</text:p>
      <text:p text:style-name="P1">}</text:p>
      <text:p text:style-name="P1"/>
      <text:p text:style-name="P1">.linea {</text:p>
      <text:p text:style-name="P1"><text:s text:c="4"/>box-sizing: border-box;</text:p>
      <text:p text:style-name="P1"><text:s text:c="4"/>width: 100%;</text:p>
      <text:p text:style-name="P1"><text:s text:c="4"/>height: 1.5px;</text:p>
      <text:p text:style-name="P1">}</text:p>
      <text:p text:style-name="P1"/>
      <text:p text:style-name="P1"/>
      <text:p text:style-name="P1"/>
      <text:p text:style-name="P1"/>
      <text:p text:style-name="P1"/>
      <text:p text:style-name="P1">.postal_pie_contenedor {</text:p>
      <text:p text:style-name="P1"><text:s text:c="4"/>box-sizing: border-box;</text:p>
      <text:p text:style-name="P1"><text:soft-page-break/><text:tab/>grid-area: POSTPIE;</text:p>
      <text:p text:style-name="P1"><text:s text:c="4"/>display: flex;</text:p>
      <text:p text:style-name="P1"><text:s text:c="4"/>flex-direction: row;</text:p>
      <text:p text:style-name="P1"><text:s text:c="4"/>justify-content:center;</text:p>
      <text:p text:style-name="P1"><text:s text:c="4"/>align-items:center;</text:p>
      <text:p text:style-name="P1">}</text:p>
      <text:p text:style-name="P1"/>
      <text:p text:style-name="P1">.postal_pie {</text:p>
      <text:p text:style-name="P1"><text:s text:c="4"/>box-sizing: border-box;</text:p>
      <text:p text:style-name="P1"><text:s text:c="4"/>font-size: .8em;</text:p>
      <text:p text:style-name="P1"><text:s text:c="4"/>text-align: right;</text:p>
      <text:p text:style-name="P1"><text:s text:c="4"/>padding: 1.5em;</text:p>
      <text:p text:style-name="P1"><text:s text:c="4"/>width: 100%;</text:p>
      <text:p text:style-name="P1">}</text:p>
      <text:p text:style-name="P1"/>
      <text:p text:style-name="P1">/*XXXXXXXXXXXXXXXXXXXXXXXXXXXXXXXXXXXXXXXXXXXXXXXXXX*/</text:p>
      <text:p text:style-name="P1">/*XXXXXXXXXXXXXXXXXXXXXXXXXXXXXXXXXXXXXXXXXXXXXXXXXX*/</text:p>
      <text:p text:style-name="P1">/* CSS GRID PRINCIPAL</text:p>
      <text:p text:style-name="P1">/*XXXXXXXXXXXXXXXXXXXXXXXXXXXXXXXXXXXXXXXXXXXXXXXXXX*/</text:p>
      <text:p text:style-name="P1">/*XXXXXXXXXXXXXXXXXXXXXXXXXXXXXXXXXXXXXXXXXXXXXXXXXX*/</text:p>
      <text:p text:style-name="P1"/>
      <text:p text:style-name="P1">.caja_maqueta {</text:p>
      <text:p text:style-name="P1"><text:s text:c="4"/>box-sizing: border-box;</text:p>
      <text:p text:style-name="P1"><text:tab/>display: grid;</text:p>
      <text:p text:style-name="P1"><text:s text:c="4"/>height: 100%;</text:p>
      <text:p text:style-name="P1"><text:s text:c="4"/>max-width: 1225px;</text:p>
      <text:p text:style-name="P1"><text:s text:c="4"/>border: 4px solid black;</text:p>
      <text:p text:style-name="P1"><text:tab/>grid-template: </text:p>
      <text:p text:style-name="P1"><text:tab/><text:tab/>"BARRSUP BARRSUP BARRSUP BARRSUP" 10% <text:s/></text:p>
      <text:p text:style-name="P1"><text:tab/><text:tab/>"TITUPAN TITUPAN TITUPAN MARGDER" 2% <text:s/></text:p>
      <text:p text:style-name="P1"><text:tab/><text:tab/>"PANEIZQ DIVISIO PANEDER MARGDER" auto <text:s/></text:p>
      <text:p text:style-name="P1"><text:tab/><text:tab/>"POSTPIE POSTPIE POSTPIE POSTPIE" 17% / <text:s/></text:p>
      <text:p text:style-name="P1"><text:tab/><text:tab/>40% 13% 26% 21%;</text:p>
      <text:p text:style-name="P1">}</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19T00:53:32.098000000</meta:creation-date>
    <dc:date>2026-05-19T02:23:16.552000000</dc:date>
    <meta:editing-duration>PT1H29M47S</meta:editing-duration>
    <meta:editing-cycles>1</meta:editing-cycles>
    <meta:document-statistic meta:table-count="0" meta:image-count="0" meta:object-count="0" meta:page-count="28" meta:paragraph-count="931" meta:word-count="2407" meta:character-count="32602" meta:non-whitespace-character-count="23381"/>
    <meta:generator>LibreOffice/7.4.0.3$Windows_X86_64 LibreOffice_project/f85e47c08ddd19c015c0114a68350214f7066f5a</meta:generator>
  </office:meta>
</office:document-meta>
</file>