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397" officeooo:paragraph-rsid="000d2397"/>
    </style:style>
    <style:style style:name="P2" style:family="paragraph" style:parent-style-name="Standard">
      <style:text-properties officeooo:paragraph-rsid="000d2397"/>
    </style:style>
    <style:style style:name="T1" style:family="text">
      <style:text-properties officeooo:rsid="000d23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talasa_sOftware</text:p>
      <text:p text:style-name="P1"/>
      <text:p text:style-name="P1">RUTA LIBRERÍA: pantalasa/pantalib/…</text:p>
      <text:p text:style-name="P1">RUTA PROYECTO: pantalasa/… (NOMBRE DEL PROYECTO)</text:p>
      <text:p text:style-name="P1"/>
      <text:p text:style-name="P1">Github </text:p>
      <text:p text:style-name="P1"/>
      <text:p text:style-name="P2"><text:a xlink:type="simple" xlink:href="mailto:software.pantalasa@gmail.com" text:style-name="Internet_20_link" text:visited-style-name="Visited_20_Internet_20_Link"><text:span text:style-name="Internet_20_link">software.pantalasa@gmail.com</text:span></text:a></text:p>
      <text:p text:style-name="P2">pantww_174*gm-ps-T</text:p>
      <text:p text:style-name="P2"/>
      <text:p text:style-name="P2">Git<text:span text:style-name="T1">h</text:span>ub</text:p>
      <text:p text:style-name="P1">pantzz_174*Gh-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9T23:58:27.712000000</meta:creation-date>
    <dc:date>2026-05-20T00:50:11.888000000</dc:date>
    <meta:editing-duration>PT51M44S</meta:editing-duration>
    <meta:editing-cycles>1</meta:editing-cycles>
    <meta:document-statistic meta:table-count="0" meta:image-count="0" meta:object-count="0" meta:page-count="1" meta:paragraph-count="8" meta:word-count="15" meta:character-count="175" meta:non-whitespace-character-count="167"/>
    <meta:generator>LibreOffice/7.4.0.3$Windows_X86_64 LibreOffice_project/f85e47c08ddd19c015c0114a68350214f7066f5a</meta:generator>
  </office:meta>
</office:document-meta>
</file>