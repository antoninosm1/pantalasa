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4.149cm"/>
    </style:style>
    <style:style style:name="co5" style:family="table-column">
      <style:table-column-properties fo:break-before="auto" style:column-width="6.9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Nombre del Campo</text:p>
          </table:table-cell>
          <table:table-cell office:value-type="string" calcext:value-type="string">
            <text:p>Tipo de Campo</text:p>
          </table:table-cell>
          <table:table-cell office:value-type="string" calcext:value-type="string">
            <text:p>Dimensión del Campo</text:p>
          </table:table-cell>
          <table:table-cell office:value-type="string" calcext:value-type="string">
            <text:p>Otra Inform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PRI <text:s/>auto_incr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uario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MUL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nicipioNum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nicipioNom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calidadNum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calidadNom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istSoc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poLoc</text:p>
          </table:table-cell>
          <table:table-cell office:value-type="string" calcext:value-type="string">
            <text:p>varc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V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Vk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P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dePk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bsV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bsVk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sP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bsPk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cRegCed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choConc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choGalv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choMad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choCar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choOtr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eTabiq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eAdob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eBlock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reMad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rePied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reCart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isoCemen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isoMad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soTier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soPied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gUsoPot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gUsoNor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gUsoRi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gUsoLluv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gConPot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gConPur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gConHerv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gConClo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gConFil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cFoSep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cLetr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xcRasSu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mbGas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bCa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bLen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mbOt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sRedM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sEn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sCieAb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sInc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lumRed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umVel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umQuin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umPlaS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umHab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cam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an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med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cin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cRegViv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eIndTar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ueIndTep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eIndWua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ueIndPim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ueIndMen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ueIndOtr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rechINSAB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rechIMSS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rechISSS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rechPEMEX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rechSEDEN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rechOtr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umPerro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umGato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umOtro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sSalINSAB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sSalIMSS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sSalISSS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sSalPEMEX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sSalSEDEN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isSalOtr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isSalMedPa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sSalCliPa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isSalPart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sSalCurand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isSalYerb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sSalHues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isSalBotica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ecRegGe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 <text:s text:c="2"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umInteg</text:p>
          </table:table-cell>
          <table:table-cell office:value-type="string" calcext:value-type="string">
            <text:p>tiny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<text:s text:c="2"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rigCapt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 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22:13:21.791000000</meta:creation-date>
    <dc:date>2024-07-28T11:44:21.473000000</dc:date>
    <meta:editing-duration>P2DT13H31M</meta:editing-duration>
    <meta:editing-cycles>1</meta:editing-cycles>
    <meta:document-statistic meta:table-count="1" meta:cell-count="482" meta:object-count="0"/>
    <meta:generator>LibreOffice/7.4.0.3$Windows_X86_64 LibreOffice_project/f85e47c08ddd19c015c0114a68350214f7066f5a</meta:generator>
  </office:meta>
</office:document-meta>
</file>