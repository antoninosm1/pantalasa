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dedb" officeooo:paragraph-rsid="0009dedb"/>
    </style:style>
    <style:style style:name="P2" style:family="paragraph" style:parent-style-name="Standard">
      <style:text-properties officeooo:rsid="0009dedb" officeooo:paragraph-rsid="000b7e1a"/>
    </style:style>
    <style:style style:name="P3" style:family="paragraph" style:parent-style-name="Standard">
      <style:text-properties officeooo:rsid="000b7e1a" officeooo:paragraph-rsid="000b7e1a"/>
    </style:style>
    <style:style style:name="T1" style:family="text">
      <style:text-properties officeooo:rsid="000b7e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SERVA que en este momento tengo una necesidad urgente. Necesito compilar una nueva App Android llamada mudanzas tomando como base la App sdhybcapp que actualmente funciona con una serie de codigos de Clases .kt de manera interna. </text:p>
      <text:p text:style-name="P1"/>
      <text:p text:style-name="P2">OBSERVA que la intención de generar una Libreria de Clases .kt externa correspondía a la idea de no duplicar códigos de Clases .kt <text:span text:style-name="T1">entre diferentes desarrollos</text:span></text:p>
      <text:p text:style-name="P2"/>
      <text:p text:style-name="P2"><text:span text:style-name="T1">OBSERVA que la mejor solución es generar una Libreria Kotlin con Kotlin puro con IntelliJ IDEA, pero ahora mismo mis Clases .kt están demasiado comprometidas con elementos de Android Studio por lo que no es una opción en este momento. </text:span></text:p>
      <text:p text:style-name="P2"/>
      <text:p text:style-name="P3">TOMA NOTA, vamos a utilizar la CATEGORÍA ESPECIALIZATE para indicar que sin cambiar el perfil principal que se indica con ACTÚA COMO JUNIOR, ASESOR o EXPERTO, debes especializarte en lo que se indica.</text:p>
      <text:p text:style-name="P2"/>
      <text:p text:style-name="P3">ACTÚA COMO EXPERTO, ESPECIALIZATE en instalación, importación, copiado y migración de proyectos de App con Android Studio.</text:p>
      <text:p text:style-name="P3"/>
      <text:p text:style-name="P3">La TAREA consistirá en hacer una copia exacta del proyecto de Android Studio sdhybcapp pero renombrandolo mudanzas, los proyectos deben ser totalmente iguales, excepto porque debe sustituirse todo lugar donde aparezca sdhybcapp por mudanzas.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6T14:27:18.651000000</meta:creation-date>
    <dc:date>2025-08-09T18:22:54.627000000</dc:date>
    <meta:editing-duration>P1DT3H51M59S</meta:editing-duration>
    <meta:editing-cycles>2</meta:editing-cycles>
    <meta:generator>LibreOffice/7.4.0.3$Windows_X86_64 LibreOffice_project/f85e47c08ddd19c015c0114a68350214f7066f5a</meta:generator>
    <meta:document-statistic meta:table-count="0" meta:image-count="0" meta:object-count="0" meta:page-count="1" meta:paragraph-count="6" meta:word-count="187" meta:character-count="1190" meta:non-whitespace-character-count="1006"/>
  </office:meta>
</office:document-meta>
</file>